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30000062CA2202817.png" manifest:media-type="image/png"/>
  <manifest:file-entry manifest:full-path="Pictures/1000000000000960000003E80AAFE0CF.png" manifest:media-type="image/png"/>
  <manifest:file-entry manifest:full-path="Pictures/10000000000007080000044C75D7BBCD.png" manifest:media-type="image/png"/>
  <manifest:file-entry manifest:full-path="Pictures/10000001000022B50000085E70DF3E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nWipe" smil:subtype="centerTop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checkerBoardWipe" smil:subtype="down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vertical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rightCenter"/>
    </style:style>
    <style:style style:name="dp12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bottomLeft"/>
    </style:style>
    <style:style style:name="dp1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gr1" style:family="graphic" style:parent-style-name="standard">
      <style:graphic-properties draw:stroke="none" svg:stroke-width="0cm" draw:fill="solid" draw:fill-color="#f8faf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dbeafe" draw:opacity="70%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solid" draw:fill-color="#fef3c7" draw:opacity="85%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0f172a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solid" draw:fill-color="#eff6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59e0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2563e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35cm" svg:stroke-color="#e2e8f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16a34a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7c3ae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solid" draw:fill-color="#0891b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solid" draw:fill-color="#dc2626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solid" draw:fill-color="#f8faf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8fafc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" style:family="paragraph">
      <loext:graphic-properties draw:fill="solid" draw:fill-color="#dbeafe" draw:opacity="7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" style:family="paragraph">
      <loext:graphic-properties draw:fill="solid" draw:fill-color="#fef3c7" draw:opacity="85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loext:graphic-properties draw:fill="solid" draw:fill-color="#0f172a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loext:graphic-properties draw:fill="solid" draw:fill-color="#eff6ff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8" style:family="paragraph">
      <loext:graphic-properties draw:fill="solid" draw:fill-color="#f59e0b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2563eb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loext:graphic-properties draw:fill="solid" draw:fill-color="#16a34a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8" style:family="paragraph">
      <loext:graphic-properties draw:fill="solid" draw:fill-color="#7c3aed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loext:graphic-properties draw:fill="solid" draw:fill-color="#0891b2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loext:graphic-properties draw:fill="solid" draw:fill-color="#dc2626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44pt" fo:letter-spacing="normal" fo:language="fr" fo:country="F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Aptos" fo:font-size="15pt" fo:letter-spacing="normal" fo:language="fr" fo:country="F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1pt" fo:letter-spacing="normal" fo:language="fr" fo:country="F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Aptos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Aptos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Aptos" fo:font-size="30pt" fo:letter-spacing="normal" fo:language="fr" fo:country="F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Aptos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Aptos" fo:font-size="17pt" fo:letter-spacing="normal" fo:language="fr" fo:country="FR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10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Aptos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3pt" fo:letter-spacing="normal" fo:language="fr" fo:country="FR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Aptos" fo:font-size="21pt" fo:letter-spacing="normal" fo:language="fr" fo:country="FR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OpenSymbol" fo:color="#3341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f172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6474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0" draw:style-name="gr4" draw:text-style-name="P4" draw:layer="layout" svg:width="14.985cm" svg:height="14.731cm" svg:x="1.778cm" svg:y="1.65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1" draw:style-name="gr5" draw:text-style-name="P5" draw:layer="layout" svg:width="16.509cm" svg:height="14.731cm" svg:x="15.494cm" svg:y="1.65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32" draw:style-name="gr6" draw:text-style-name="P7" draw:layer="layout" svg:width="13.08cm" svg:height="2.158cm" svg:x="2.667cm" svg:y="2.667cm">
          <text:p text:style-name="P6"><text:span text:style-name="T1">EduTr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7" draw:text-style-name="P7" draw:layer="layout" svg:width="12.445cm" svg:height="2.666cm" svg:x="2.743cm" svg:y="4.877cm">
          <text:p text:style-name="P6"><text:span text:style-name="T2">Système de suivi pédagogique et de gestion automatisée des honoraires enseign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s 34" draw:style-name="gr8" draw:text-style-name="P7" draw:layer="layout" svg:width="12.953cm" svg:height="3.809cm" svg:x="2.616cm" svg:y="8.128cm">
          <text:list text:style-name="L4">
            <text:list-item>
              <text:p text:style-name="P6"><text:span text:style-name="T3">Application web pour l’administration</text:span></text:p>
            </text:list-item>
            <text:list-item>
              <text:p text:style-name="P6"><text:span text:style-name="T3">Application mobile pour les enseignants</text:span></text:p>
            </text:list-item>
            <text:list-item>
              <text:p text:style-name="P6"><text:span text:style-name="T3">Backend sécurisé avec QR Code et JW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9" draw:text-style-name="P8" draw:layer="layout" svg:width="5.587cm" svg:height="1.066cm" svg:x="2.667cm" svg:y="14.2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36" draw:style-name="gr10" draw:text-style-name="P7" draw:layer="layout" svg:width="5.079cm" svg:height="0.634cm" svg:x="2.997cm" svg:y="14.427cm">
          <text:p text:style-name="P6"><text:span text:style-name="T4">Soutenance • 15 min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INTEC_nom_Horizon-1-3-1.png" draw:style-name="gr11" draw:text-style-name="P9" draw:layer="layout" svg:width="8.889cm" svg:height="3.936cm" svg:x="18.796cm" svg:y="5.207cm">
          <draw:image xlink:href="Pictures/10000001000022B50000085E70DF3EAF.png" xlink:type="simple" xlink:show="embed" xlink:actuate="onLoad" draw:mime-type="image/png">
            <text:p/>
          </draw:image>
        </draw:frame>
        <draw:custom-shape draw:name="Text 38" draw:style-name="gr12" draw:text-style-name="P11" draw:layer="layout" svg:width="11.683cm" svg:height="2.031cm" svg:x="17.78cm" svg:y="10.287cm">
          <text:p text:style-name="P10"><text:span text:style-name="T5">Une solution simple pour suivre les cours, les présences et les paie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13" draw:text-style-name="P13" draw:layer="layout" svg:width="2.793cm" svg:height="0.558cm" svg:x="27.813cm" svg:y="17.602cm">
          <text:p text:style-name="P12"><text:span text:style-name="T6">1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4s" smil:type="pinWheelWipe" smil:subtype="oneBlade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15" draw:text-style-name="P7" draw:layer="layout" svg:width="22.351cm" svg:height="1.396cm" svg:x="1.651cm" svg:y="0.889cm">
          <text:p text:style-name="P6"><text:span text:style-name="T7">1. Le problème consta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" draw:text-style-name="P7" draw:layer="layout" svg:width="26.415cm" svg:height="0.964cm" svg:x="1.727cm" svg:y="2.337cm">
          <text:p text:style-name="P6"><text:span text:style-name="T8">Dans beaucoup d’établissements, le suivi pédagogique reste difficile à contrô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0" draw:style-name="gr18" draw:text-style-name="P16" draw:layer="layout" svg:width="13.842cm" svg:height="3.098cm" svg:x="1.905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1" draw:style-name="gr17" draw:text-style-name="P15" draw:layer="layout" svg:width="0.202cm" svg:height="3.098cm" svg:x="1.90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9" draw:text-style-name="P7" draw:layer="layout" svg:width="12.826cm" svg:height="0.863cm" svg:x="2.464cm" svg:y="4.902cm">
          <text:p text:style-name="P6"><text:span text:style-name="T9">Prés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0" draw:text-style-name="P7" draw:layer="layout" svg:width="12.775cm" svg:height="1.193cm" svg:x="2.464cm" svg:y="6.02cm">
          <text:p text:style-name="P6"><text:span text:style-name="T8">Les émargements sont souvent manuels ou difficiles à vérifi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8" draw:text-style-name="P16" draw:layer="layout" svg:width="13.842cm" svg:height="3.098cm" svg:x="16.713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5" draw:style-name="gr21" draw:text-style-name="P17" draw:layer="layout" svg:width="0.202cm" svg:height="3.098cm" svg:x="16.71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2" draw:text-style-name="P7" draw:layer="layout" svg:width="12.826cm" svg:height="0.863cm" svg:x="17.272cm" svg:y="4.902cm">
          <text:p text:style-name="P6"><text:span text:style-name="T9">Fiche de pro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23" draw:text-style-name="P7" draw:layer="layout" svg:width="12.775cm" svg:height="1.193cm" svg:x="17.272cm" svg:y="6.02cm">
          <text:p text:style-name="P6"><text:span text:style-name="T8">Les contenus réalisés en classe ne sont pas toujours centralisé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8" draw:text-style-name="P16" draw:layer="layout" svg:width="13.842cm" svg:height="3.098cm" svg:x="1.905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9" draw:style-name="gr9" draw:text-style-name="P8" draw:layer="layout" svg:width="0.202cm" svg:height="3.098cm" svg:x="1.905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4" draw:text-style-name="P7" draw:layer="layout" svg:width="12.826cm" svg:height="0.863cm" svg:x="2.464cm" svg:y="8.89cm">
          <text:p text:style-name="P6"><text:span text:style-name="T9">Honor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25" draw:text-style-name="P7" draw:layer="layout" svg:width="12.775cm" svg:height="1.193cm" svg:x="2.464cm" svg:y="10.008cm">
          <text:p text:style-name="P6"><text:span text:style-name="T8">Le calcul des heures et des montants prend du temp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8" draw:text-style-name="P16" draw:layer="layout" svg:width="13.842cm" svg:height="3.098cm" svg:x="16.713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3" draw:style-name="gr26" draw:text-style-name="P18" draw:layer="layout" svg:width="0.202cm" svg:height="3.098cm" svg:x="16.713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27" draw:text-style-name="P7" draw:layer="layout" svg:width="12.826cm" svg:height="0.863cm" svg:x="17.272cm" svg:y="8.89cm">
          <text:p text:style-name="P6"><text:span text:style-name="T9">Contrô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8" draw:text-style-name="P7" draw:layer="layout" svg:width="12.775cm" svg:height="1.193cm" svg:x="17.272cm" svg:y="10.008cm">
          <text:p text:style-name="P6"><text:span text:style-name="T8">Il manque une vue claire pour l’administ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29" draw:text-style-name="P13" draw:layer="layout" svg:width="2.793cm" svg:height="0.558cm" svg:x="27.813cm" svg:y="17.602cm">
          <text:p text:style-name="P12"><text:span text:style-name="T6">2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 xml:id="id3" draw:id="id3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30" draw:text-style-name="P7" draw:layer="layout" svg:width="22.351cm" svg:height="1.396cm" svg:x="1.651cm" svg:y="0.889cm">
          <text:p text:style-name="P6"><text:span text:style-name="T7">2. Notre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1" draw:text-style-name="P7" draw:layer="layout" svg:width="26.415cm" svg:height="0.964cm" svg:x="1.727cm" svg:y="2.337cm">
          <text:p text:style-name="P6"><text:span text:style-name="T8">EduTrack centralise le suivi des cours, des présences et des paie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Bullets 30" draw:style-name="gr32" draw:text-style-name="P7" draw:layer="layout" svg:width="18.795cm" svg:height="9.651cm" svg:x="2.413cm" svg:y="4.445cm">
          <text:list text:style-name="L4">
            <text:list-item>
              <text:p text:style-name="P6"><text:span text:style-name="T10">Un enseignant scanne un QR Code pour confirmer sa présence.</text:span></text:p>
            </text:list-item>
            <text:list-item>
              <text:p text:style-name="P6"><text:span text:style-name="T10">Il remplit ensuite la fiche de progression du cours.</text:span></text:p>
            </text:list-item>
            <text:list-item>
              <text:p text:style-name="P6"><text:span text:style-name="T10">L’administration suit les présences et valide les informations.</text:span></text:p>
            </text:list-item>
            <text:list-item>
              <text:p text:style-name="P6"><text:span text:style-name="T10">Le système calcule les honoraires à partir des séances réellement effectué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33" draw:text-style-name="P13" draw:layer="layout" svg:width="2.793cm" svg:height="0.558cm" svg:x="27.813cm" svg:y="17.602cm">
          <text:p text:style-name="P12"><text:span text:style-name="T6">3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xml:id="id4" draw:id="id4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34" draw:text-style-name="P7" draw:layer="layout" svg:width="22.351cm" svg:height="1.396cm" svg:x="1.651cm" svg:y="0.889cm">
          <text:p text:style-name="P6"><text:span text:style-name="T7">3. Les acteurs du syst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5" draw:text-style-name="P7" draw:layer="layout" svg:width="26.415cm" svg:height="0.964cm" svg:x="1.727cm" svg:y="2.337cm">
          <text:p text:style-name="P6"><text:span text:style-name="T8">Deux profils principaux utilisent EduTrac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Diagramme_cas_utilisation_vf_png.png" draw:style-name="gr11" draw:text-style-name="P9" draw:layer="layout" svg:width="20.065cm" svg:height="12.318cm" svg:x="7.935cm" svg:y="4.182cm">
          <draw:image xlink:href="Pictures/10000000000007080000044C75D7BBCD.png" xlink:type="simple" xlink:show="embed" xlink:actuate="onLoad" draw:mime-type="image/png">
            <text:p/>
          </draw:image>
        </draw:frame>
        <draw:custom-shape draw:name="Text 31" draw:style-name="gr36" draw:text-style-name="P11" draw:layer="layout" svg:width="27.939cm" svg:height="0.888cm" svg:x="2.337cm" svg:y="16.307cm">
          <text:p text:style-name="P10"><text:span text:style-name="T11">Administrateur : gère les données et supervise. Enseignant : consulte, émarge et remplit sa Fiche de progres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37" draw:text-style-name="P13" draw:layer="layout" svg:width="2.793cm" svg:height="0.558cm" svg:x="27.813cm" svg:y="17.602cm">
          <text:p text:style-name="P12"><text:span text:style-name="T6">4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 xml:id="id5" draw:id="id5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38" draw:text-style-name="P7" draw:layer="layout" svg:width="22.351cm" svg:height="1.396cm" svg:x="1.651cm" svg:y="0.889cm">
          <text:p text:style-name="P6"><text:span text:style-name="T7">4. Ce que fait l’administr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9" draw:text-style-name="P7" draw:layer="layout" svg:width="26.415cm" svg:height="0.964cm" svg:x="1.727cm" svg:y="2.337cm">
          <text:p text:style-name="P6"><text:span text:style-name="T8">L’interface web permet de piloter tout le systè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0" draw:style-name="gr18" draw:text-style-name="P16" draw:layer="layout" svg:width="9.092cm" svg:height="3.098cm" svg:x="1.905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1" draw:style-name="gr17" draw:text-style-name="P15" draw:layer="layout" svg:width="0.202cm" svg:height="3.098cm" svg:x="1.90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0" draw:text-style-name="P7" draw:layer="layout" svg:width="8.076cm" svg:height="0.863cm" svg:x="2.464cm" svg:y="4.902cm">
          <text:p text:style-name="P6"><text:span text:style-name="T9">Utilis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41" draw:text-style-name="P7" draw:layer="layout" svg:width="8.025cm" svg:height="1.193cm" svg:x="2.464cm" svg:y="6.02cm">
          <text:p text:style-name="P6"><text:span text:style-name="T8">Créer et modifier les enseignants et administrateu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8" draw:text-style-name="P16" draw:layer="layout" svg:width="9.092cm" svg:height="3.098cm" svg:x="11.963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5" draw:style-name="gr21" draw:text-style-name="P17" draw:layer="layout" svg:width="0.202cm" svg:height="3.098cm" svg:x="11.96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42" draw:text-style-name="P7" draw:layer="layout" svg:width="8.076cm" svg:height="0.863cm" svg:x="12.522cm" svg:y="4.902cm">
          <text:p text:style-name="P6"><text:span text:style-name="T9">Référent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43" draw:text-style-name="P7" draw:layer="layout" svg:width="8.025cm" svg:height="1.193cm" svg:x="12.522cm" svg:y="6.02cm">
          <text:p text:style-name="P6"><text:span text:style-name="T8">Gérer départements, filières, classes, matières et sal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8" draw:text-style-name="P16" draw:layer="layout" svg:width="9.092cm" svg:height="3.098cm" svg:x="22.022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9" draw:style-name="gr9" draw:text-style-name="P8" draw:layer="layout" svg:width="0.202cm" svg:height="3.098cm" svg:x="22.02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44" draw:text-style-name="P7" draw:layer="layout" svg:width="8.076cm" svg:height="0.863cm" svg:x="22.581cm" svg:y="4.902cm">
          <text:p text:style-name="P6"><text:span text:style-name="T9">Pla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45" draw:text-style-name="P7" draw:layer="layout" svg:width="8.025cm" svg:height="1.193cm" svg:x="22.581cm" svg:y="6.02cm">
          <text:p text:style-name="P6"><text:span text:style-name="T8">Planifier les cours et générer les séanc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8" draw:text-style-name="P16" draw:layer="layout" svg:width="9.092cm" svg:height="3.098cm" svg:x="1.905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3" draw:style-name="gr26" draw:text-style-name="P18" draw:layer="layout" svg:width="0.202cm" svg:height="3.098cm" svg:x="1.905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46" draw:text-style-name="P7" draw:layer="layout" svg:width="8.076cm" svg:height="0.863cm" svg:x="2.464cm" svg:y="8.89cm">
          <text:p text:style-name="P6"><text:span text:style-name="T9">Q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7" draw:text-style-name="P7" draw:layer="layout" svg:width="8.025cm" svg:height="1.193cm" svg:x="2.464cm" svg:y="10.008cm">
          <text:p text:style-name="P6"><text:span text:style-name="T8">Générer et afficher les QR Codes pour les émarge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8" draw:text-style-name="P16" draw:layer="layout" svg:width="9.092cm" svg:height="3.098cm" svg:x="11.963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7" draw:style-name="gr48" draw:text-style-name="P19" draw:layer="layout" svg:width="0.202cm" svg:height="3.098cm" svg:x="11.963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49" draw:text-style-name="P7" draw:layer="layout" svg:width="8.076cm" svg:height="0.863cm" svg:x="12.522cm" svg:y="8.89cm">
          <text:p text:style-name="P6"><text:span text:style-name="T9">Su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50" draw:text-style-name="P7" draw:layer="layout" svg:width="8.025cm" svg:height="1.193cm" svg:x="12.522cm" svg:y="10.008cm">
          <text:p text:style-name="P6"><text:span text:style-name="T8">Consulter les présences et les fiches pédagogiq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16" draw:layer="layout" svg:width="9.092cm" svg:height="3.098cm" svg:x="22.022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51" draw:style-name="gr51" draw:text-style-name="P20" draw:layer="layout" svg:width="0.202cm" svg:height="3.098cm" svg:x="22.022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52" draw:text-style-name="P7" draw:layer="layout" svg:width="8.076cm" svg:height="0.863cm" svg:x="22.581cm" svg:y="8.89cm">
          <text:p text:style-name="P6"><text:span text:style-name="T9">Honor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53" draw:text-style-name="P7" draw:layer="layout" svg:width="8.025cm" svg:height="1.193cm" svg:x="22.581cm" svg:y="10.008cm">
          <text:p text:style-name="P6"><text:span text:style-name="T8">Calculer, valider et exporter les paie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54" draw:text-style-name="P13" draw:layer="layout" svg:width="2.793cm" svg:height="0.558cm" svg:x="27.813cm" svg:y="17.602cm">
          <text:p text:style-name="P12"><text:span text:style-name="T6">5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 xml:id="id6" draw:id="id6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55" draw:text-style-name="P7" draw:layer="layout" svg:width="22.351cm" svg:height="1.396cm" svg:x="1.651cm" svg:y="0.889cm">
          <text:p text:style-name="P6"><text:span text:style-name="T7">5. Ce que fait l’enseign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6" draw:text-style-name="P7" draw:layer="layout" svg:width="26.415cm" svg:height="0.964cm" svg:x="1.727cm" svg:y="2.337cm">
          <text:p text:style-name="P6"><text:span text:style-name="T8">L’application mobile simplifie le travail quotidien de l’enseigna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Bullets 30" draw:style-name="gr57" draw:text-style-name="P7" draw:layer="layout" svg:width="18.795cm" svg:height="9.651cm" svg:x="2.413cm" svg:y="4.445cm">
          <text:list text:style-name="L4">
            <text:list-item>
              <text:p text:style-name="P6"><text:span text:style-name="T10">Se connecter avec son compte enseignant.</text:span></text:p>
            </text:list-item>
            <text:list-item>
              <text:p text:style-name="P6"><text:span text:style-name="T10">Consulter son planning de cours.</text:span></text:p>
            </text:list-item>
            <text:list-item>
              <text:p text:style-name="P6"><text:span text:style-name="T10">Scanner le QR Code de la séance.</text:span></text:p>
            </text:list-item>
            <text:list-item>
              <text:p text:style-name="P6"><text:span text:style-name="T10">Remplir la fiche de progression après le cours.</text:span></text:p>
            </text:list-item>
            <text:list-item>
              <text:p text:style-name="P6"><text:span text:style-name="T10">Consulter ses honoraires et son profi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58" draw:text-style-name="P13" draw:layer="layout" svg:width="2.793cm" svg:height="0.558cm" svg:x="27.813cm" svg:y="17.602cm">
          <text:p text:style-name="P12"><text:span text:style-name="T6">6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 xml:id="id7" draw:id="id7">
        <office:forms form:automatic-focus="false" form:apply-design-mode="false"/>
        <draw:custom-shape draw:name="Shape 2" draw:style-name="gr59" draw:text-style-name="P1" draw:layer="layout" svg:width="33.866cm" svg:height="19.049cm" svg:x="0.001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60" draw:text-style-name="P7" draw:layer="layout" svg:width="22.351cm" svg:height="1.396cm" svg:x="1.651cm" svg:y="0.889cm">
          <text:p text:style-name="P6"><text:span text:style-name="T7">6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1" draw:text-style-name="P7" draw:layer="layout" svg:width="26.415cm" svg:height="0.964cm" svg:x="1.727cm" svg:y="2.337cm">
          <text:p text:style-name="P6"><text:span text:style-name="T8">Le système est séparé en trois couches simp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4.png" draw:style-name="gr11" draw:text-style-name="P9" draw:layer="layout" svg:width="28.574cm" svg:height="12.064cm" svg:x="1cm" svg:y="4.243cm">
          <draw:image xlink:href="Pictures/1000000000000960000003E80AAFE0CF.png" xlink:type="simple" xlink:show="embed" xlink:actuate="onLoad" draw:mime-type="image/png">
            <text:p/>
          </draw:image>
        </draw:frame>
        <draw:custom-shape draw:name="Text 31" draw:style-name="gr62" draw:text-style-name="P11" draw:layer="layout" svg:width="27.939cm" svg:height="0.888cm" svg:x="2.337cm" svg:y="16.307cm">
          <text:p text:style-name="P10"><text:span text:style-name="T11">Frontend web, application mobile, backend Spring Boot, base PostgreSQ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63" draw:text-style-name="P13" draw:layer="layout" svg:width="2.793cm" svg:height="0.558cm" svg:x="27.813cm" svg:y="17.602cm">
          <text:p text:style-name="P12"><text:span text:style-name="T6">7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Blank" xml:id="id8" draw:id="id8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64" draw:text-style-name="P7" draw:layer="layout" svg:width="22.351cm" svg:height="1.396cm" svg:x="1.651cm" svg:y="0.889cm">
          <text:p text:style-name="P6"><text:span text:style-name="T7">7. Backend et sécur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5" draw:text-style-name="P7" draw:layer="layout" svg:width="26.415cm" svg:height="0.964cm" svg:x="1.727cm" svg:y="2.337cm">
          <text:p text:style-name="P6"><text:span text:style-name="T8">Le backend est le cœur du systè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0" draw:style-name="gr18" draw:text-style-name="P16" draw:layer="layout" svg:width="9.092cm" svg:height="3.098cm" svg:x="1.905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1" draw:style-name="gr17" draw:text-style-name="P15" draw:layer="layout" svg:width="0.202cm" svg:height="3.098cm" svg:x="1.90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66" draw:text-style-name="P7" draw:layer="layout" svg:width="8.076cm" svg:height="0.863cm" svg:x="2.464cm" svg:y="4.902cm">
          <text:p text:style-name="P6"><text:span text:style-name="T9">Spring 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67" draw:text-style-name="P7" draw:layer="layout" svg:width="8.025cm" svg:height="1.193cm" svg:x="2.464cm" svg:y="6.02cm">
          <text:p text:style-name="P6"><text:span text:style-name="T8">Expose les API REST utilisées par le web et le mob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8" draw:text-style-name="P16" draw:layer="layout" svg:width="9.092cm" svg:height="3.098cm" svg:x="11.963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5" draw:style-name="gr21" draw:text-style-name="P17" draw:layer="layout" svg:width="0.202cm" svg:height="3.098cm" svg:x="11.96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68" draw:text-style-name="P7" draw:layer="layout" svg:width="8.076cm" svg:height="0.863cm" svg:x="12.522cm" svg:y="4.902cm">
          <text:p text:style-name="P6"><text:span text:style-name="T9">JW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69" draw:text-style-name="P7" draw:layer="layout" svg:width="8.025cm" svg:height="1.193cm" svg:x="12.522cm" svg:y="6.02cm">
          <text:p text:style-name="P6"><text:span text:style-name="T8">Protège les routes avec un token après connex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8" draw:text-style-name="P16" draw:layer="layout" svg:width="9.092cm" svg:height="3.098cm" svg:x="22.022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9" draw:style-name="gr9" draw:text-style-name="P8" draw:layer="layout" svg:width="0.202cm" svg:height="3.098cm" svg:x="22.02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70" draw:text-style-name="P7" draw:layer="layout" svg:width="8.076cm" svg:height="0.863cm" svg:x="22.581cm" svg:y="4.902cm">
          <text:p text:style-name="P6"><text:span text:style-name="T9">Postgre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71" draw:text-style-name="P7" draw:layer="layout" svg:width="8.025cm" svg:height="1.193cm" svg:x="22.581cm" svg:y="6.02cm">
          <text:p text:style-name="P6"><text:span text:style-name="T8">Stocke les utilisateurs, séances, émargements et honorai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8" draw:text-style-name="P16" draw:layer="layout" svg:width="9.092cm" svg:height="3.098cm" svg:x="1.905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3" draw:style-name="gr26" draw:text-style-name="P18" draw:layer="layout" svg:width="0.202cm" svg:height="3.098cm" svg:x="1.905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72" draw:text-style-name="P7" draw:layer="layout" svg:width="8.076cm" svg:height="0.863cm" svg:x="2.464cm" svg:y="8.89cm">
          <text:p text:style-name="P6"><text:span text:style-name="T9">Swa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73" draw:text-style-name="P7" draw:layer="layout" svg:width="8.025cm" svg:height="1.193cm" svg:x="2.464cm" svg:y="10.008cm">
          <text:p text:style-name="P6"><text:span text:style-name="T8">Permet de tester et documenter les endpoi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8" draw:text-style-name="P16" draw:layer="layout" svg:width="9.092cm" svg:height="3.098cm" svg:x="11.963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7" draw:style-name="gr48" draw:text-style-name="P19" draw:layer="layout" svg:width="0.202cm" svg:height="3.098cm" svg:x="11.963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74" draw:text-style-name="P7" draw:layer="layout" svg:width="8.076cm" svg:height="0.863cm" svg:x="12.522cm" svg:y="8.89cm">
          <text:p text:style-name="P6"><text:span text:style-name="T9">Rô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75" draw:text-style-name="P7" draw:layer="layout" svg:width="8.025cm" svg:height="1.193cm" svg:x="12.522cm" svg:y="10.008cm">
          <text:p text:style-name="P6"><text:span text:style-name="T8">Administrateur et enseignant ont des accès différ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16" draw:layer="layout" svg:width="9.092cm" svg:height="3.098cm" svg:x="22.022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51" draw:style-name="gr51" draw:text-style-name="P20" draw:layer="layout" svg:width="0.202cm" svg:height="3.098cm" svg:x="22.022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76" draw:text-style-name="P7" draw:layer="layout" svg:width="8.076cm" svg:height="0.863cm" svg:x="22.581cm" svg:y="8.89cm">
          <text:p text:style-name="P6"><text:span text:style-name="T9">Ex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77" draw:text-style-name="P7" draw:layer="layout" svg:width="8.025cm" svg:height="1.193cm" svg:x="22.581cm" svg:y="10.008cm">
          <text:p text:style-name="P6"><text:span text:style-name="T8">Génération Excel et PDF pour les rappor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78" draw:text-style-name="P13" draw:layer="layout" svg:width="2.793cm" svg:height="0.558cm" svg:x="27.813cm" svg:y="17.602cm">
          <text:p text:style-name="P12"><text:span text:style-name="T6">8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Blank" xml:id="id9" draw:id="id9">
        <office:forms form:automatic-focus="false" form:apply-design-mode="false"/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79" draw:text-style-name="P7" draw:layer="layout" svg:width="22.351cm" svg:height="1.396cm" svg:x="1.651cm" svg:y="0.889cm">
          <text:p text:style-name="P6"><text:span text:style-name="T7">8. Exemple : émargement par Q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0" draw:text-style-name="P7" draw:layer="layout" svg:width="26.415cm" svg:height="0.964cm" svg:x="1.727cm" svg:y="2.337cm">
          <text:p text:style-name="P6"><text:span text:style-name="T8">Le QR Code permet de rendre la présence plus fi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2.png" draw:style-name="gr11" draw:text-style-name="P9" draw:layer="layout" svg:width="28.574cm" svg:height="12.064cm" svg:x="2.286cm" svg:y="4.115cm">
          <draw:image xlink:href="Pictures/10000001000008830000062CA2202817.png" xlink:type="simple" xlink:show="embed" xlink:actuate="onLoad" draw:mime-type="image/png">
            <text:p/>
          </draw:image>
        </draw:frame>
        <draw:custom-shape draw:name="Text 31" draw:style-name="gr81" draw:text-style-name="P11" draw:layer="layout" svg:width="27.939cm" svg:height="0.888cm" svg:x="2.337cm" svg:y="16.307cm">
          <text:p text:style-name="P10"><text:span text:style-name="T11">Le mobile scanne, le backend vérifie, puis la base enregistre l’émarge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82" draw:text-style-name="P13" draw:layer="layout" svg:width="2.793cm" svg:height="0.558cm" svg:x="27.813cm" svg:y="17.602cm">
          <text:p text:style-name="P12"><text:span text:style-name="T6">9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Blank" xml:id="id10" draw:id="id10"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83" draw:text-style-name="P7" draw:layer="layout" svg:width="22.351cm" svg:height="1.396cm" svg:x="1.651cm" svg:y="0.889cm">
          <text:p text:style-name="P6"><text:span text:style-name="T7">9. Démonstration pra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4" draw:text-style-name="P7" draw:layer="layout" svg:width="26.415cm" svg:height="0.964cm" svg:x="1.727cm" svg:y="2.337cm">
          <text:p text:style-name="P6"><text:span text:style-name="T8">Objectif : montrer rapidement le fonctionnement réel du proj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0" draw:style-name="gr17" draw:text-style-name="P15" draw:layer="layout" svg:width="2.539cm" svg:height="1.218cm" svg:x="2.54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31" draw:style-name="gr85" draw:text-style-name="P11" draw:layer="layout" svg:width="2.539cm" svg:height="0.634cm" svg:x="2.54cm" svg:y="4.648cm">
          <text:p text:style-name="P10"><text:span text:style-name="T12">1 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86" draw:text-style-name="P7" draw:layer="layout" svg:width="20.827cm" svg:height="1.066cm" svg:x="5.715cm" svg:y="4.547cm">
          <text:p text:style-name="P6"><text:span text:style-name="T13">Connexion administr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7" draw:text-style-name="P15" draw:layer="layout" svg:width="2.539cm" svg:height="1.218cm" svg:x="2.54cm" svg:y="6.5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34" draw:style-name="gr87" draw:text-style-name="P11" draw:layer="layout" svg:width="2.539cm" svg:height="0.634cm" svg:x="2.54cm" svg:y="6.731cm">
          <text:p text:style-name="P10"><text:span text:style-name="T12">1 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88" draw:text-style-name="P7" draw:layer="layout" svg:width="20.827cm" svg:height="1.066cm" svg:x="5.715cm" svg:y="6.629cm">
          <text:p text:style-name="P6"><text:span text:style-name="T13">Création ou consultation d’un enseign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5" draw:layer="layout" svg:width="2.539cm" svg:height="1.218cm" svg:x="2.54cm" svg:y="8.6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37" draw:style-name="gr89" draw:text-style-name="P11" draw:layer="layout" svg:width="2.539cm" svg:height="0.634cm" svg:x="2.54cm" svg:y="8.814cm">
          <text:p text:style-name="P10"><text:span text:style-name="T12">1 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90" draw:text-style-name="P7" draw:layer="layout" svg:width="20.827cm" svg:height="1.066cm" svg:x="5.715cm" svg:y="8.712cm">
          <text:p text:style-name="P6"><text:span text:style-name="T13">Planning et génération Q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21" draw:text-style-name="P17" draw:layer="layout" svg:width="2.539cm" svg:height="1.218cm" svg:x="2.54cm" svg:y="10.6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40" draw:style-name="gr91" draw:text-style-name="P11" draw:layer="layout" svg:width="2.539cm" svg:height="0.634cm" svg:x="2.54cm" svg:y="10.897cm">
          <text:p text:style-name="P10"><text:span text:style-name="T12">1 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92" draw:text-style-name="P7" draw:layer="layout" svg:width="20.827cm" svg:height="1.066cm" svg:x="5.715cm" svg:y="10.795cm">
          <text:p text:style-name="P6"><text:span text:style-name="T13">Scan côté mobile enseign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21" draw:text-style-name="P17" draw:layer="layout" svg:width="2.539cm" svg:height="1.218cm" svg:x="2.54cm" svg:y="12.7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43" draw:style-name="gr93" draw:text-style-name="P11" draw:layer="layout" svg:width="2.539cm" svg:height="0.634cm" svg:x="2.54cm" svg:y="12.979cm">
          <text:p text:style-name="P10"><text:span text:style-name="T12">1 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94" draw:text-style-name="P7" draw:layer="layout" svg:width="20.827cm" svg:height="1.066cm" svg:x="5.715cm" svg:y="12.878cm">
          <text:p text:style-name="P6"><text:span text:style-name="T13">Fiche de progression + suivi des honor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95" draw:text-style-name="P13" draw:layer="layout" svg:width="2.793cm" svg:height="0.558cm" svg:x="27.813cm" svg:y="17.602cm">
          <text:p text:style-name="P12"><text:span text:style-name="T6">10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Blank" xml:id="id11" draw:id="id11">
        <draw:custom-shape draw:name="Shape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96" draw:text-style-name="P7" draw:layer="layout" svg:width="22.351cm" svg:height="1.396cm" svg:x="1.651cm" svg:y="0.889cm">
          <text:p text:style-name="P6"><text:span text:style-name="T7">10. Résultats obte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7" draw:text-style-name="P7" draw:layer="layout" svg:width="26.415cm" svg:height="0.964cm" svg:x="1.727cm" svg:y="2.337cm">
          <text:p text:style-name="P6"><text:span text:style-name="T8">Le projet répond aux besoins principaux du suivi pédagogiq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0" draw:style-name="gr18" draw:text-style-name="P16" draw:layer="layout" svg:width="13.842cm" svg:height="3.098cm" svg:x="1.905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1" draw:style-name="gr17" draw:text-style-name="P15" draw:layer="layout" svg:width="0.202cm" svg:height="3.098cm" svg:x="1.90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98" draw:text-style-name="P7" draw:layer="layout" svg:width="12.826cm" svg:height="0.863cm" svg:x="2.464cm" svg:y="4.902cm">
          <text:p text:style-name="P6"><text:span text:style-name="T9">Gain de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99" draw:text-style-name="P7" draw:layer="layout" svg:width="12.775cm" svg:height="1.193cm" svg:x="2.464cm" svg:y="6.02cm">
          <text:p text:style-name="P6"><text:span text:style-name="T8">Moins de calculs manuels pour les honorai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8" draw:text-style-name="P16" draw:layer="layout" svg:width="13.842cm" svg:height="3.098cm" svg:x="16.713cm" svg:y="4.4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5" draw:style-name="gr21" draw:text-style-name="P17" draw:layer="layout" svg:width="0.202cm" svg:height="3.098cm" svg:x="16.71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00" draw:text-style-name="P7" draw:layer="layout" svg:width="12.826cm" svg:height="0.863cm" svg:x="17.272cm" svg:y="4.902cm">
          <text:p text:style-name="P6"><text:span text:style-name="T9">Traçabi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01" draw:text-style-name="P7" draw:layer="layout" svg:width="12.775cm" svg:height="1.193cm" svg:x="17.272cm" svg:y="6.02cm">
          <text:p text:style-name="P6"><text:span text:style-name="T8">Chaque présence est liée à une séance et un enseigna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8" draw:text-style-name="P16" draw:layer="layout" svg:width="13.842cm" svg:height="3.098cm" svg:x="1.905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9" draw:style-name="gr9" draw:text-style-name="P8" draw:layer="layout" svg:width="0.202cm" svg:height="3.098cm" svg:x="1.905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02" draw:text-style-name="P7" draw:layer="layout" svg:width="12.826cm" svg:height="0.863cm" svg:x="2.464cm" svg:y="8.89cm">
          <text:p text:style-name="P6"><text:span text:style-name="T9">Centr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03" draw:text-style-name="P7" draw:layer="layout" svg:width="12.775cm" svg:height="1.193cm" svg:x="2.464cm" svg:y="10.008cm">
          <text:p text:style-name="P6"><text:span text:style-name="T8">Les données pédagogiques sont dans une seule platefor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8" draw:text-style-name="P16" draw:layer="layout" svg:width="13.842cm" svg:height="3.098cm" svg:x="16.713cm" svg:y="8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3" draw:style-name="gr26" draw:text-style-name="P18" draw:layer="layout" svg:width="0.202cm" svg:height="3.098cm" svg:x="16.713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04" draw:text-style-name="P7" draw:layer="layout" svg:width="12.826cm" svg:height="0.863cm" svg:x="17.272cm" svg:y="8.89cm">
          <text:p text:style-name="P6"><text:span text:style-name="T9">Contrô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05" draw:text-style-name="P7" draw:layer="layout" svg:width="12.775cm" svg:height="1.193cm" svg:x="17.272cm" svg:y="10.008cm">
          <text:p text:style-name="P6"><text:span text:style-name="T8">L’administration dispose d’une meilleure visibilité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106" draw:text-style-name="P13" draw:layer="layout" svg:width="2.793cm" svg:height="0.558cm" svg:x="27.813cm" svg:y="17.602cm">
          <text:p text:style-name="P12"><text:span text:style-name="T6">11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Blank" xml:id="id12" draw:id="id12">
        <draw:custom-shape draw:name="Shape 2" draw:style-name="gr1" draw:text-style-name="P1" draw:layer="layout" svg:width="33.866cm" svg:height="19.049cm" svg:x="0.5cm" svg:y="-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0.159cm" svg:height="10.159cm" svg:x="-3.048cm" svg:y="-2.2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4" draw:style-name="gr3" draw:text-style-name="P3" draw:layer="layout" svg:width="7.619cm" svg:height="7.619cm" svg:x="26.67cm" svg:y="13.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107" draw:text-style-name="P7" draw:layer="layout" svg:width="22.351cm" svg:height="1.396cm" svg:x="1.651cm" svg:y="0.889cm">
          <text:p text:style-name="P6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8" draw:text-style-name="P7" draw:layer="layout" svg:width="26.415cm" svg:height="0.964cm" svg:x="1.727cm" svg:y="2.337cm">
          <text:p text:style-name="P6"><text:span text:style-name="T8">EduTrack est une solution complète, moderne et évolu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.666cm" svg:height="0.126cm" svg:x="1.727cm" svg:y="3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Bullets 30" draw:style-name="gr109" draw:text-style-name="P7" draw:layer="layout" svg:width="18.795cm" svg:height="9.651cm" svg:x="2.413cm" svg:y="4.445cm">
          <text:list text:style-name="L4">
            <text:list-item>
              <text:p text:style-name="P6"><text:span text:style-name="T10">Le projet combine web, mobile et backend sécurisé.</text:span></text:p>
            </text:list-item>
            <text:list-item>
              <text:p text:style-name="P6"><text:span text:style-name="T10">Il simplifie le suivi pédagogique et la gestion des honoraires.</text:span></text:p>
            </text:list-item>
            <text:list-item>
              <text:p text:style-name="P6"><text:span text:style-name="T10">Il peut évoluer vers les notifications, statistiques avancées et déploiement cloud.</text:span></text:p>
            </text:list-item>
            <text:list-item>
              <text:p text:style-name="P6"><text:span text:style-name="T10">Merci pour votre atten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0" draw:style-name="gr110" draw:text-style-name="P13" draw:layer="layout" svg:width="2.793cm" svg:height="0.558cm" svg:x="27.813cm" svg:y="17.602cm">
          <text:p text:style-name="P12"><text:span text:style-name="T6">12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4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EduTrack">
        <loext:theme-colors loext:name="EduTrack">
          <loext:color loext:name="dark1" loext:color="#0f172a"/>
          <loext:color loext:name="light1" loext:color="#ffffff"/>
          <loext:color loext:name="dark2" loext:color="#334155"/>
          <loext:color loext:name="light2" loext:color="#f8fafc"/>
          <loext:color loext:name="accent1" loext:color="#2563eb"/>
          <loext:color loext:name="accent2" loext:color="#16a34a"/>
          <loext:color loext:name="accent3" loext:color="#f59e0b"/>
          <loext:color loext:name="accent4" loext:color="#7c3aed"/>
          <loext:color loext:name="accent5" loext:color="#0891b2"/>
          <loext:color loext:name="accent6" loext:color="#dc2626"/>
          <loext:color loext:name="hyperlink" loext:color="#2563eb"/>
          <loext:color loext:name="followed-hyperlink" loext:color="#7c3aed"/>
        </loext:theme-colors>
      </loext:the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sentation EduTrack</dc:title>
    <meta:initial-creator>EduTrack</meta:initial-creator>
    <meta:generator>LibreOffice/24.2.7.2$Linux_X86_64 LibreOffice_project/420$Build-2</meta:generator>
    <dc:date>2026-06-26T20:51:09.339275065</dc:date>
    <meta:editing-duration>PT12M19S</meta:editing-duration>
    <meta:editing-cycles>3</meta:editing-cycles>
    <meta:document-statistic meta:object-count="236"/>
    <meta:user-defined meta:name="PresentationFormat">Wide</meta:user-defined>
    <meta:user-defined meta:name="Slides" meta:value-type="float">12</meta:user-defined>
  </office:meta>
</office:document-meta>
</file>