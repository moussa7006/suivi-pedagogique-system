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BB00000564C7B310E1.png" manifest:media-type="image/png"/>
  <manifest:file-entry manifest:full-path="Pictures/10000000000009860000117FE1DE0EA7.png" manifest:media-type="image/png"/>
  <manifest:file-entry manifest:full-path="Pictures/10000001000008830000062CFD9F2BFE.png" manifest:media-type="image/png"/>
  <manifest:file-entry manifest:full-path="Pictures/1000000100000946000006F376FC3D3D.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2="urn:oasis:names:tc:opendocument:xmlns:svg-compatible:1.0" xmlns:ns4="http://openoffice.org/2009/office" xmlns:ns6="urn:org:documentfoundation:names:experimental:office:xmlns:loext:1.0" xmlns:office="urn:oasis:names:tc:opendocument:xmlns:office:1.0" xmlns:style="urn:oasis:names:tc:opendocument:xmlns:style:1.0" xmlns:text="urn:oasis:names:tc:opendocument:xmlns:text:1.0" xmlns:xlink="http://www.w3.org/1999/xlink" office:version="1.4">
  <office:scripts/>
  <office:font-face-decls>
    <style:font-face style:name="Calibri" ns2:font-family="Calibri" style:font-family-generic="roman" style:font-pitch="variable"/>
    <style:font-face style:name="Cambria" ns2:font-family="Cambria" style:font-family-generic="roman" style:font-pitch="variable"/>
    <style:font-face style:name="Courier" ns2:font-family="Courier" style:font-family-generic="roman" style:font-pitch="variable"/>
    <style:font-face style:name="F" ns2:font-family="" style:font-family-generic="system" style:font-pitch="variable"/>
    <style:font-face style:name="Liberation Sans" ns2:font-family="'Liberation Sans'" style:font-family-generic="swiss" style:font-pitch="variable"/>
    <style:font-face style:name="Noto Sans CJK SC" ns2:font-family="'Noto Sans CJK SC'" style:font-family-generic="system" style:font-pitch="variable"/>
    <style:font-face style:name="Noto Sans Devanagari" ns2:font-family="'Noto Sans Devanagari'" style:font-family-generic="swiss"/>
    <style:font-face style:name="Noto Sans Devanagari1" ns2:font-family="'Noto Sans Devanagari'" style:font-family-generic="system" style:font-pitch="variable"/>
    <style:font-face style:name="Times New Roman" ns2:font-family="'Times New Roman'" style:font-family-generic="roman" style:font-pitch="variable"/>
    <style:font-face style:name="ＭＳ ゴシック" ns2:font-family="'ＭＳ ゴシック'" style:font-family-generic="system" style:font-pitch="variable"/>
    <style:font-face style:name="ＭＳ 明朝" ns2:font-family="'ＭＳ 明朝'" style:font-family-generic="system" style:font-pitch="variable"/>
  </office:font-face-decls>
  <office:automatic-styles>
    <style:style style:name="P1" style:family="paragraph" style:parent-style-name="Standard">
      <style:paragraph-properties fo:margin-top="0cm" fo:margin-bottom="0.212cm" style:contextual-spacing="false" fo:line-height="150%"/>
    </style:style>
    <style:style style:name="P2" style:family="paragraph" style:parent-style-name="Standard">
      <style:paragraph-properties fo:margin-top="0cm" fo:margin-bottom="0.212cm" style:contextual-spacing="false" fo:line-height="150%" fo:text-align="center" style:justify-single-word="false"/>
    </style:style>
    <style:style style:name="P3" style:family="paragraph" style:parent-style-name="Standard" style:master-page-name="Converted1">
      <style:paragraph-properties fo:margin-top="0cm" fo:margin-bottom="0.212cm" style:contextual-spacing="false" fo:line-height="150%" style:page-number="1"/>
    </style:style>
    <style:style style:name="P4" style:family="paragraph" style:parent-style-name="Standard">
      <style:paragraph-properties fo:margin-top="0cm" fo:margin-bottom="0.212cm" style:contextual-spacing="false" fo:line-height="150%" fo:break-before="page"/>
    </style:style>
    <style:style style:name="P5" style:family="paragraph" style:parent-style-name="Standard" style:master-page-name="Converted2">
      <style:paragraph-properties fo:margin-top="0cm" fo:margin-bottom="0.212cm" style:contextual-spacing="false" fo:line-height="150%" style:page-number="1"/>
    </style:style>
    <style:style style:name="P6" style:family="paragraph" style:parent-style-name="Standard">
      <style:paragraph-properties fo:margin-top="0cm" fo:margin-bottom="0.212cm" style:contextual-spacing="false" fo:line-height="150%" fo:text-align="left" style:justify-single-word="false"/>
    </style:style>
    <style:style style:name="P7" style:family="paragraph" style:parent-style-name="Standard">
      <style:paragraph-properties fo:margin-top="0.423cm" fo:margin-bottom="0.141cm" style:contextual-spacing="false" fo:text-align="center" style:justify-single-word="false"/>
    </style:style>
    <style:style style:name="P8" style:family="paragraph" style:parent-style-name="Standard">
      <style:paragraph-properties fo:margin-top="0.071cm" fo:margin-bottom="0.423cm" style:contextual-spacing="false" fo:text-align="center" style:justify-single-word="false"/>
    </style:style>
    <style:style style:name="P9" style:family="paragraph" style:parent-style-name="Standard" style:master-page-name="Converted3">
      <style:paragraph-properties fo:margin-top="0cm" fo:margin-bottom="0.212cm" style:contextual-spacing="false" fo:line-height="150%" style:page-number="1"/>
    </style:style>
    <style:style style:name="P10" style:family="paragraph" style:parent-style-name="Standard">
      <style:paragraph-properties fo:margin-top="0cm" fo:margin-bottom="0.071cm" style:contextual-spacing="false" fo:line-height="150%"/>
    </style:style>
    <style:style style:name="P11" style:family="paragraph" style:parent-style-name="Standard" style:master-page-name="Converted4">
      <style:paragraph-properties fo:margin-top="0cm" fo:margin-bottom="0.212cm" style:contextual-spacing="false" fo:line-height="150%" style:page-number="1"/>
    </style:style>
    <style:style style:name="T1" style:family="text">
      <style:text-properties style:font-name="Times New Roman" fo:font-size="14pt" fo:font-style="normal" fo:font-weight="bold" style:font-size-asian="14pt" style:font-style-asian="normal" style:font-weight-asian="bold"/>
    </style:style>
    <style:style style:name="T2" style:family="text">
      <style:text-properties style:font-name="Times New Roman" fo:font-size="12pt" fo:font-style="normal" fo:font-weight="bold" style:font-size-asian="12pt" style:font-style-asian="normal" style:font-weight-asian="bold"/>
    </style:style>
    <style:style style:name="T3" style:family="text">
      <style:text-properties style:font-name="Times New Roman" fo:font-size="12pt" fo:font-style="normal" fo:font-weight="normal" style:font-size-asian="12pt" style:font-style-asian="normal" style:font-weight-asian="normal"/>
    </style:style>
    <style:style style:name="T4" style:family="text">
      <style:text-properties style:font-name="Times New Roman" fo:font-size="18pt" fo:font-style="normal" fo:font-weight="bold" style:font-size-asian="18pt" style:font-style-asian="normal" style:font-weight-asian="bold"/>
    </style:style>
    <style:style style:name="T5" style:family="text">
      <style:text-properties style:font-name="Times New Roman" fo:font-size="16pt" fo:font-style="normal" fo:font-weight="bold" style:font-size-asian="16pt" style:font-style-asian="normal" style:font-weight-asian="bold"/>
    </style:style>
    <style:style style:name="T6" style:family="text">
      <style:text-properties style:font-name="Times New Roman" fo:font-size="13pt" fo:font-style="normal" fo:font-weight="bold" style:font-size-asian="13pt" style:font-style-asian="normal" style:font-weight-asian="bold"/>
    </style:style>
    <style:style style:name="T7" style:family="text">
      <style:text-properties style:font-name="Times New Roman" fo:font-size="11pt" fo:font-style="normal" fo:font-weight="normal" style:font-size-asian="11pt" style:font-style-asian="normal" style:font-weight-asian="normal"/>
    </style:style>
    <style:style style:name="T8" style:family="text">
      <style:text-properties style:font-name="Times New Roman" fo:font-size="12pt" fo:font-style="normal" fo:font-weight="bold" ns4:rsid="00152391" style:font-size-asian="12pt" style:font-style-asian="normal" style:font-weight-asian="bold"/>
    </style:style>
    <style:style style:name="T9" style:family="text">
      <style:text-properties style:font-name="Times New Roman" fo:font-size="10pt" fo:font-style="normal" fo:font-weight="normal" style:font-size-asian="10pt" style:font-style-asian="normal" style:font-weight-asian="normal"/>
    </style:style>
    <style:style style:name="T10" style:family="text">
      <style:text-properties style:font-name="Times New Roman" fo:font-size="12pt" fo:font-style="italic" fo:font-weight="bold" style:font-size-asian="12pt" style:font-style-asian="italic" style:font-weight-asian="bold"/>
    </style:style>
    <style:style style:name="T11" style:family="text">
      <style:text-properties style:font-name="Times New Roman" fo:font-size="10pt" fo:font-style="italic" style:font-size-asian="10pt" style:font-style-asian="italic"/>
    </style:style>
    <style:style style:name="T12" style:family="text">
      <style:text-properties style:font-name="Times New Roman" fo:font-size="12pt" fo:font-weight="bold" style:font-size-asian="12pt" style:font-weight-asian="bold"/>
    </style:style>
    <style:style style:name="T13" style:family="text">
      <style:text-properties style:font-name="Times New Roman" fo:font-size="12pt" style:font-size-asian="12pt"/>
    </style:style>
    <style:style style:name="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ns6: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2"><text:span text:style-name="T1">INSTITUT SUPÉRIEUR DES TECHNIQUES</text:span></text:p>
      <text:p text:style-name="P2"><text:span text:style-name="T1">ÉCONOMIQUES COMPTABLES ET COMMERCIALES</text:span></text:p>
      <text:p text:style-name="P2"><text:span text:style-name="T2">DUT – LICENCE – MASTER</text:span></text:p>
      <text:p text:style-name="P1"/>
      <text:p text:style-name="P2"><text:span text:style-name="T3">──────────────────────────────────────────────────</text:span></text:p>
      <text:p text:style-name="P1"/>
      <text:p text:style-name="P2"><text:span text:style-name="T4">MÉMOIRE DE FIN DE CYCLE</text:span></text:p>
      <text:p text:style-name="P1"/>
      <text:p text:style-name="P2"><text:span text:style-name="T1">Thème :</text:span></text:p>
      <text:p text:style-name="P1"/>
      <text:p text:style-name="P2"><text:span text:style-name="T5">CONCEPTION ET DÉVELOPPEMENT D'UN SYSTÈME DE</text:span></text:p>
      <text:p text:style-name="P2"><text:span text:style-name="T5">SUIVI PÉDAGOGIQUE ET DE GESTION DES</text:span></text:p>
      <text:p text:style-name="P2"><text:span text:style-name="T5">HONORAIRES DES ENSEIGNANTS</text:span></text:p>
      <text:p text:style-name="P1"/>
      <text:p text:style-name="P2"><text:span text:style-name="T1">Cas pratique : EduTrack</text:span></text:p>
      <text:p text:style-name="P1"/>
      <text:p text:style-name="P2"><text:span text:style-name="T3">──────────────────────────────────────────────────</text:span></text:p>
      <text:p text:style-name="P1"><text:soft-page-break/></text:p>
      <text:p text:style-name="P2"><text:span text:style-name="T6">Année Universitaire 2025 - 2026</text:span></text:p>
      <text:p text:style-name="P1"/>
      <text:p text:style-name="P2"><text:span text:style-name="T7">Présenté par :</text:span></text:p>
      <text:p text:style-name="P2"><text:span text:style-name="T6">Aya BOURAMA &amp; Moussa Balla KEITA</text:span></text:p>
      <text:p text:style-name="P1"/>
      <text:p text:style-name="P2"><text:span text:style-name="T7">Sous la direction de :</text:span></text:p>
      <text:p text:style-name="P2"><text:span text:style-name="T2">M. </text:span><text:span text:style-name="T8">Mahmoud Dembele</text:span></text:p>
      <text:p text:style-name="P1"/>
      <text:p text:style-name="P2"><text:span text:style-name="T9">Hamdallaye ACI 2000 PB : E5671, entre le monument « Bougie Ba » et la place CAN</text:span></text:p>
      <text:p text:style-name="P2"><text:span text:style-name="T9">(+223) 44 38 28 03 / 78 88 02 02 / 68 88 02 02</text:span></text:p>
      <text:p text:style-name="P2"><text:span text:style-name="T9">www.intec-sup.com | intecsup@intec-sup.com</text:span></text:p>
      <text:p text:style-name="P3"><text:span text:style-name="T5">Dédicace</text:span></text:p>
      <text:p text:style-name="P1"/>
      <text:p text:style-name="P1"><text:span text:style-name="T3">Je dédie ce mémoire à mes parents, pour leur amour inconditionnel, leurs sacrifices et leur soutien indéfectible tout au long de mon parcours académique. Que ce travail soit le reflet de leur dévouement et une modeste reconnaissance de tout ce qu'ils ont fait pour moi.<text:line-break/><text:line-break/>À mes frères et sœurs, pour leur encouragement constant.<text:line-break/><text:line-break/>À tous mes enseignants, pour la qualité de leur encadrement et leur contribution à ma formation.</text:span></text:p>
      <text:p text:style-name="Standard"/>
      <text:p text:style-name="P4"><text:span text:style-name="T5">Remerciements</text:span></text:p>
      <text:p text:style-name="P1"/>
      <text:p text:style-name="P1"><text:span text:style-name="T3">Au terme de ce travail, nous tenons à exprimer notre profonde gratitude à toutes les personnes qui ont contribué, de près ou de loin, à la réalisation de ce mémoire.<text:line-break/><text:line-break/>Nous remercions tout d'abord notre Directeur de mémoire, Monsieur/Madame [Nom], pour sa disponibilité, ses conseils éclairés et son accompagnement rigoureux tout au long de ce travail. Sa patience et sa rigueur académique ont été d'une aide précieuse.<text:line-break/><text:line-break/>Nous exprimons notre reconnaissance à l'ensemble du corps professoral de l'INTEC SUP pour la qualité de la formation dispensée et pour les valeurs transmises.<text:line-break/><text:line-break/>Nous remercions également nos camarades de promotion pour les échanges fructueux et la solidarité dont ils ont fait preuve.<text:line-break/><text:line-break/>Enfin, nous adressons nos sincères remerciements à toutes les personnes qui ont participé à l'élaboration de ce travail par leurs conseils et leur soutien moral.</text:span></text:p>
      <text:p text:style-name="Standard"/>
      <text:p text:style-name="P4"><text:span text:style-name="T5">Sommaire</text:span></text:p>
      <text:p text:style-name="P1"/>
      <text:p text:style-name="P1"><text:span text:style-name="T3">Introduction</text:span></text:p>
      <text:p text:style-name="P1"><text:span text:style-name="T3">Partie I : Cadre théorique</text:span></text:p>
      <text:p text:style-name="P1"><text:span text:style-name="T3">Chapitre 1 : Généralités sur les systèmes de suivi pédagogique</text:span></text:p>
      <text:p text:style-name="P1"><text:span text:style-name="T3"><text:s text:c="2"/>Section 1 : Concepts fondamentaux de la gestion pédagogique</text:span></text:p>
      <text:p text:style-name="P1"><text:span text:style-name="T3"><text:s text:c="2"/>Section 2 : La gestion des honoraires des enseignants</text:span></text:p>
      <text:p text:style-name="P1"><text:span text:style-name="T3">Chapitre 2 : Technologies et architectures de développement</text:span></text:p>
      <text:p text:style-name="P1"><text:span text:style-name="T3"><text:s text:c="2"/>Section 1 : Technologies backend et bases de données</text:span></text:p>
      <text:p text:style-name="P1"><text:span text:style-name="T3"><text:s text:c="2"/>Section 2 : Technologies frontend et mobile</text:span></text:p>
      <text:p text:style-name="P1"><text:span text:style-name="T3">Partie II : Cas pratique – Analyse, conception et implémentation d'EduTrack</text:span></text:p>
      <text:p text:style-name="P1"><text:span text:style-name="T3">Chapitre 1 : Analyse et conception du système</text:span></text:p>
      <text:p text:style-name="P1"><text:span text:style-name="T3"><text:s text:c="2"/>Section 1 : Analyse des besoins et spécifications</text:span></text:p>
      <text:p text:style-name="P1"><text:span text:style-name="T3"><text:s text:c="2"/>Section 2 : Architecture du système</text:span></text:p>
      <text:p text:style-name="P1"><text:span text:style-name="T3">Chapitre 2 : Implémentation et validation</text:span></text:p>
      <text:p text:style-name="P1"><text:span text:style-name="T3"><text:s text:c="2"/>Section 1 : Implémentation du backend et frontend web</text:span></text:p>
      <text:p text:style-name="P1"><text:span text:style-name="T3"><text:s text:c="2"/>Section 2 : Implémentation mobile et tests</text:span></text:p>
      <text:p text:style-name="P1"><text:span text:style-name="T3">Conclusion</text:span></text:p>
      <text:p text:style-name="P1"><text:span text:style-name="T3">Bibliographie</text:span></text:p>
      <text:p text:style-name="P1"><text:span text:style-name="T3">Annexes</text:span></text:p>
      <text:p text:style-name="P1"><text:span text:style-name="T3">Table des matières</text:span></text:p>
      <text:p text:style-name="Standard"/>
      <text:p text:style-name="P4"><text:span text:style-name="T5">Résumé</text:span></text:p>
      <text:p text:style-name="P1"/>
      <text:p text:style-name="P1"><text:span text:style-name="T3">Ce mémoire présente la conception et le développement d'EduTrack, un système intégré de suivi pédagogique et de gestion des honoraires des enseignants. Le système répond à un besoin croissant des établissements d'enseignement supérieur de disposer d'outils numériques modernes pour assurer un suivi efficace des activités pédagogiques et une gestion transparente des honoraires des enseignants.<text:line-break/><text:line-break/>EduTrack se compose de trois volets principaux : un backend développé avec Spring Boot 3.4.3 et Java, offrant une API REST sécurisée par JWT ; une interface web administrateur réalisée avec Angular 21 et PrimeNG ; et une application mobile développée avec Ionic 8 et Capacitor, destinée aux enseignants pour le scan de QR codes et le suivi de leurs séances.<text:line-break/><text:line-break/>Le système intègre des fonctionnalités avancées telles que la gestion des classes, matières, filières, départements, salles et années universitaires, la planification des emplois du temps, l'émargement électronique via QR code, le suivi de la progression pédagogique, le calcul automatisé des honoraires, et la génération de rapports statistiques.<text:line-break/><text:line-break/>La méthodologie adoptée combine une approche de recherche documentaire pour le cadre théorique et une approche pratique fondée sur les cycles de développement logiciel agiles. Les résultats obtenus démontrent l'efficacité du système à répondre aux exigences fonctionnelles et non fonctionnelles définies, tout en offrant une expérience utilisateur optimale sur les différentes plateformes.<text:line-break/><text:line-break/>Mots-clés : Suivi pédagogique, gestion des honoraires, Spring Boot, Angular, Ionic, émargement électronique, QR code.</text:span></text:p>
      <text:p text:style-name="P5"><text:span text:style-name="T5">Introduction</text:span></text:p>
      <text:p text:style-name="P1"/>
      <text:p text:style-name="P1"><text:span text:style-name="T3">Dans un contexte où la transformation numérique des établissements d'enseignement supérieur est devenue une nécessité incontournable, la gestion efficace des activités pédagogiques constitue un enjeu majeur pour les institutions de formation. L'INTEC SUP, en tant qu'institut supérieur de référence au Mali, se doit d'adopter des solutions technologiques modernes pour optimiser ses processus de gestion pédagogique et administrative.<text:line-break/><text:line-break/>La gestion des activités pédagogiques dans un établissement d'enseignement supérieur implique la coordination de nombreux acteurs : enseignants, étudiants, administration, et direction pédagogique. Chacun de ces acteurs intervient dans des processus complexes allant de la planification des cours à l'évaluation des enseignements, en passant par le suivi des présences et le calcul des honoraires des enseignants.<text:line-break/><text:line-break/>Traditionnellement, ces processus étaient gérés de manière manuelle ou semi-automatisée à l'aide d'outils bureautiques, ce qui entraînait des difficultés de coordination, des erreurs de saisie, des pertes de temps et un manque de visibilité sur l'ensemble des activités. Face à ces constats, il est apparu nécessaire de concevoir un système intégré permettant de centraliser et d'automatiser ces différentes tâches.<text:line-break/><text:line-break/>C'est dans ce cadre que s'inscrit le présent mémoire, qui porte sur la conception et le développement d'EduTrack, un système de suivi pédagogique et de gestion des honoraires des enseignants. Ce système vise à offrir une solution complète, moderne et adaptée aux besoins spécifiques de l'INTEC SUP, en combinant une interface web pour l'administration et une application mobile pour les enseignants.<text:line-break/><text:line-break/>La problématique centrale de cette recherche peut être formulée comme suit : Comment concevoir et développer un système intégré de suivi pédagogique et de gestion des honoraires des enseignants qui réponde efficacement aux besoins de l'INTEC SUP en termes de fonctionnalités, de fiabilité, de sécurité et d'expérience utilisateur ?<text:line-break/></text:span><text:soft-page-break/><text:span text:style-name="T3"><text:line-break/>Pour répondre à cette problématique, nous avons structuré notre travail en deux grandes parties. La première partie, consacrée au cadre théorique, aborde les concepts fondamentaux liés au suivi pédagogique et à la gestion des honoraires, ainsi que les technologies utilisées pour le développement du système. La seconde partie, dédiée au cas pratique, présente l'analyse, la conception et l'implémentation d'EduTrack, en détaillant l'architecture du système, le développement des différents composants et les résultats obtenus.</text:span></text:p>
      <text:p text:style-name="P1">Problématique</text:p>
      <text:p text:style-name="P1">Malgré l’importance du suivi pédagogique dans les établissements d’enseignement supérieur, plusieurs opérations restent souvent réalisées de manière manuelle ou dispersée : planification des séances, contrôle de présence des enseignants, saisie du cahier de textes, suivi des volumes horaires et préparation des honoraires. Ces pratiques peuvent entraîner des pertes d’information, des retards de traitement, des difficultés de vérification et un manque de traçabilité dans la gestion pédagogique.</text:p>
      <text:p text:style-name="P1">La problématique centrale de ce mémoire peut donc être formulée ainsi : comment concevoir et développer une solution numérique intégrée permettant d’assurer efficacement le suivi pédagogique, de fiabiliser l’émargement des enseignants et de faciliter la gestion transparente des honoraires au sein d’un établissement d’enseignement supérieur ?</text:p>
      <text:p text:style-name="P1">Questions de recherche</text:p>
      <text:p text:style-name="P1">Pour répondre à cette problématique, notre travail s’articule autour des questions suivantes :</text:p>
      <text:p text:style-name="P1">• Comment centraliser les informations relatives aux enseignants, aux classes, aux matières, aux salles et aux séances ?</text:p>
      <text:p text:style-name="P1">• Comment permettre aux enseignants de renseigner simplement le cahier de textes depuis une application mobile ?</text:p>
      <text:p text:style-name="P1">• Comment fiabiliser l’émargement des enseignants à travers un mécanisme de QR Code et de géolocalisation ?</text:p>
      <text:p text:style-name="P1">• Comment mettre à disposition de l’administration un tableau de bord facilitant le suivi pédagogique et la prise de décision ?</text:p>
      <text:p text:style-name="P1">• Comment préparer les données nécessaires au calcul des honoraires à partir des séances effectivement réalisées ?</text:p>
      <text:p text:style-name="P1">Objectif général</text:p>
      <text:p text:style-name="P1">L’objectif général de ce projet est de concevoir et développer un système web et mobile, nommé EduTrack, destiné au suivi pédagogique et à la gestion des honoraires des enseignants.</text:p>
      <text:p text:style-name="P1">Objectifs spécifiques</text:p>
      <text:p text:style-name="P1">Les objectifs spécifiques poursuivis sont les suivants :</text:p>
      <text:p text:style-name="P1">• mettre en place une API REST sécurisée avec Spring Boot et JWT ;</text:p>
      <text:p text:style-name="P1">• développer une interface web d’administration avec Angular ;</text:p>
      <text:p text:style-name="P1">• développer une application mobile enseignant avec Ionic et Angular ;</text:p>
      <text:p text:style-name="P1">• gérer les utilisateurs, enseignants, départements, filières, classes, matières, salles et années universitaires ;</text:p>
      <text:p text:style-name="P1">• planifier les séances et générer les QR Codes d’émargement ;</text:p>
      <text:p text:style-name="P1">• permettre la saisie du cahier de textes et le suivi des progressions pédagogiques ;</text:p>
      <text:p text:style-name="P1">• faciliter l’émargement des enseignants et la consultation de l’historique des séances ;</text:p>
      <text:p text:style-name="P1">• produire une base fiable pour le suivi des volumes horaires et des honoraires.</text:p>
      <text:p text:style-name="P1">Hypothèses de travail</text:p>
      <text:p text:style-name="P1">Ce travail repose sur les hypothèses suivantes :</text:p>
      <text:p text:style-name="P1">• la digitalisation du suivi pédagogique améliore la disponibilité et la fiabilité des informations ;</text:p>
      <text:p text:style-name="P1">• l’utilisation du QR Code réduit les risques d’erreurs et de fraudes liés à l’émargement manuel ;</text:p>
      <text:p text:style-name="P1">• une application mobile dédiée facilite l’adoption du système par les enseignants ;</text:p>
      <text:p text:style-name="P1">• la centralisation des données facilite le contrôle administratif et la préparation des honoraires.</text:p>
      <text:p text:style-name="P1">Méthodologie de travail</text:p>
      <text:p text:style-name="P1">La méthodologie adoptée est une démarche itérative combinant analyse des besoins, conception, développement et validation. Elle a commencé par l’identification des acteurs et des processus à informatiser, puis par la modélisation UML du système. Le développement a ensuite été réalisé en trois couches : backend Spring Boot, frontend web Angular et application mobile Ionic. Des tests fonctionnels ont été effectués sur les principaux scénarios : authentification, gestion des référentiels, planification des séances, saisie du cahier de textes, scan QR et consultation des données.</text:p>
      <text:p text:style-name="P1">Annonce du plan</text:p>
      <text:p text:style-name="P1">Le présent mémoire est organisé en deux grandes parties. La première partie présente le cadre théorique relatif au suivi pédagogique, à la gestion des honoraires et aux technologies utilisées. La seconde partie est consacrée au cas pratique EduTrack, notamment l’analyse des besoins, la conception, l’implémentation et la validation du système.</text:p>
      <text:p text:style-name="Standard"/>
      <text:p text:style-name="P4"><text:span text:style-name="T5">Partie I : Cadre théorique</text:span></text:p>
      <text:p text:style-name="P1"/>
      <text:p text:style-name="P1"><text:span text:style-name="T3">Cette première partie pose les fondements théoriques nécessaires à la compréhension de notre travail. Elle est structurée en deux chapitres. Le premier chapitre aborde les généralités sur les systèmes de suivi pédagogique, en définissant les concepts clés et en présentant les acteurs impliqués dans les processus pédagogiques. Le deuxième chapitre se concentre sur les technologies et architectures utilisées pour le développement d'applications web et mobiles modernes.</text:span></text:p>
      <text:p text:style-name="P1"><text:span text:style-name="T1">Chapitre 1 : Généralités sur les systèmes de suivi pédagogique</text:span></text:p>
      <text:p text:style-name="P1"/>
      <text:p text:style-name="P1"><text:span text:style-name="T3">Le suivi pédagogique constitue un pilier fondamental de l'enseignement supérieur moderne. Il englobe l'ensemble des activités visant à planifier, organiser, coordonner et évaluer les actions pédagogiques au sein d'un établissement d'enseignement. Ce chapitre présente les concepts fondamentaux liés au suivi pédagogique et à la gestion des honoraires des enseignants.</text:span></text:p>
      <text:p text:style-name="P6"><text:span text:style-name="T6">Section 1 : Concepts fondamentaux de la gestion pédagogique</text:span></text:p>
      <text:p text:style-name="P1"/>
      <text:p text:style-name="P1"><text:span text:style-name="T10">I- Définition et objectifs du suivi pédagogique</text:span></text:p>
      <text:p text:style-name="P1"><text:span text:style-name="T3">Le suivi pédagogique peut être défini comme l'ensemble des processus et des outils mis en œuvre par un établissement d'enseignement pour assurer le suivi, le contrôle et l'amélioration continue des activités d'enseignement et d'apprentissage. Il s'agit d'une démarche systématique qui permet de collecter, d'analyser et d'exploiter des données relatives au déroulement des activités pédagogiques.<text:line-break/><text:line-break/>Les objectifs principaux du suivi pédagogique sont :<text:line-break/>- Assurer la planification et la coordination des activités d'enseignement ;<text:line-break/>- Garantir le respect des programmes et des objectifs pédagogiques ;<text:line-break/>- Faciliter la communication entre les différents acteurs (administration, enseignants, étudiants) ;<text:line-break/>- Permettre l'évaluation et l'amélioration continue de la qualité des enseignements ;<text:line-break/></text:span><text:soft-page-break/><text:span text:style-name="T3">- Assurer la traçabilité des activités pédagogiques à des fins de reporting et de certification.<text:line-break/><text:line-break/>Dans un contexte de digitalisation croissante de l'enseignement supérieur, les systèmes d'information pédagogiques jouent un rôle crucial dans l'atteinte de ces objectifs. Ils permettent d'automatiser les tâches répétitives, de centraliser les données et d'offrir une visibilité en temps réel sur l'état d'avancement des activités pédagogiques.</text:span></text:p>
      <text:p text:style-name="P1"><text:span text:style-name="T10">II- Les acteurs et processus pédagogiques</text:span></text:p>
      <text:p text:style-name="P1"><text:span text:style-name="T3">Le système pédagogique d'un établissement d'enseignement supérieur implique plusieurs catégories d'acteurs, chacun jouant un rôle spécifique dans le processus global :<text:line-break/><text:line-break/>L'administration pédagogique est responsable de la planification stratégique des enseignements, de la définition des programmes, de l'affectation des enseignants et de la gestion des calendriers académiques. Elle assure également le suivi administratif des dossiers des étudiants et des enseignants.<text:line-break/><text:line-break/>Les enseignants constituent les acteurs principaux de la mise en œuvre des activités pédagogiques. Ils sont responsables de la préparation et de l'animation des séances d'enseignement, de l'évaluation des apprentissages et du suivi des progrès des étudiants. Ils doivent également assurer le respect des horaires et des programmes établis.<text:line-break/><text:line-break/>Les étudiants sont les bénéficiaires directs des activités pédagogiques. Leur suivi individuel est essentiel pour garantir la réussite de leur parcours de formation.<text:line-break/><text:line-break/>Les processus pédagogiques fondamentaux incluent :<text:line-break/>- La planification des enseignements (définition des emplois du temps, affectation des salles) ;<text:line-break/>- Le déroulement des séances d'enseignement (présence des enseignants et des étudiants) ;<text:line-break/>- L'évaluation des apprentissages (contrôles, examens, notation) ;<text:line-break/>- Le reporting et l'analyse des résultats pédagogiques.</text:span></text:p>
      <text:p text:style-name="P6"><text:span text:style-name="T6">Section 2 : La gestion des honoraires des enseignants</text:span></text:p>
      <text:p text:style-name="P1"/>
      <text:p text:style-name="P1"><text:soft-page-break/><text:span text:style-name="T10">I- Principes de calcul et de gestion des honoraires</text:span></text:p>
      <text:p text:style-name="P1"><text:span text:style-name="T3">La gestion des honoraires des enseignants est un aspect crucial de l'administration des établissements d'enseignement supérieur. Elle englobe l'ensemble des processus visant à calculer, justifier et verser les rémunérations dues aux enseignants pour leurs prestations pédagogiques.<text:line-break/><text:line-break/>Le calcul des honoraires repose généralement sur plusieurs paramètres :<text:line-break/>- Le volume horaire effectué par l'enseignant (nombre d'heures de cours dispensées) ;<text:line-break/>- Le type d'enseignement (cours magistraux, travaux dirigés, travaux pratiques) ;<text:line-break/>- Le niveau d'enseignement (Licence, Master) ;<text:line-break/>- Le statut de l'enseignant (vacataire, permanent, associé) ;<text:line-break/>- Les taux horaires applicables, qui peuvent varier selon le grade et l'ancienneté.<text:line-break/><text:line-break/>La gestion efficace des honoraires nécessite un système fiable de collecte et de traitement des données de présence, capable de justifier chaque heure déclarée et de produire des états de paiement précis et vérifiables.</text:span></text:p>
      <text:p text:style-name="P1"><text:span text:style-name="T10">II- Les défis de la gestion des honoraires dans l'enseignement supérieur</text:span></text:p>
      <text:p text:style-name="P1"><text:span text:style-name="T3">La gestion des honoraires dans l'enseignement supérieur présente plusieurs défis majeurs :<text:line-break/><text:line-break/>Le premier défi est celui de la fiabilité des données de présence. Les méthodes traditionnelles de pointage (feuilles de présence papier) sont sujettes à des erreurs de saisie, des omissions et des falsifications. L'automatisation du processus d'émargement via des technologies numériques permet de réduire considérablement ces risques.<text:line-break/><text:line-break/>Le deuxième défi concerne la complexité des règles de calcul. Les grilles tarifaires peuvent être complexes, avec des taux différents selon le type d'enseignement, le niveau, le grade de l'enseignant, et d'autres critères. Un système automatisé doit être capable de gérer cette complexité tout en restant transparent et vérifiable.<text:line-break/><text:line-break/>Le troisième défi est celui de la traçabilité et de l'auditabilité. Les établissements doivent être en mesure de justifier chaque paiement effectué, ce qui nécessite une conservation fiable des </text:span><text:soft-page-break/><text:span text:style-name="T3">preuves de prestation (émargements, fiches de progression, etc.).<text:line-break/><text:line-break/>Enfin, le quatrième défi est celui de l'intégration avec les autres systèmes de gestion de l'établissement (gestion académique, comptabilité, ressources humaines) pour assurer une cohérence globale des données et éviter les doubles saisies.</text:span></text:p>
      <text:p text:style-name="Standard"/>
      <text:p text:style-name="P4"><text:span text:style-name="T1">Chapitre 2 : Technologies et architectures de développement</text:span></text:p>
      <text:p text:style-name="P1"/>
      <text:p text:style-name="P1"><text:span text:style-name="T3">Le développement d'un système intégré de suivi pédagogique nécessite le choix judicieux de technologies adaptées aux exigences du projet. Ce chapitre présente les technologies retenues pour la réalisation d'EduTrack, en justifiant leur pertinence au regard des objectifs fixés. Nous abordons successivement les technologies backend et bases de données, puis les technologies frontend et mobile.</text:span></text:p>
      <text:p text:style-name="P6"><text:span text:style-name="T6">Section 1 : Technologies backend et bases de données</text:span></text:p>
      <text:p text:style-name="P1"/>
      <text:p text:style-name="P1"><text:span text:style-name="T10">I- Spring Boot et architectures REST</text:span></text:p>
      <text:p text:style-name="P1"><text:span text:style-name="T3">Spring Boot est un framework Java qui facilite le développement d'applications d'entreprise en offrant une configuration automatique et des dépendances pré-configurées. Il repose sur le langage Java, qui apporte des fonctionnalités modernes telles que les records, les text blocks, et l'amélioration des switch expressions.<text:line-break/><text:line-break/>L'architecture REST est un style d'architecture logicielle qui définit un ensemble de contraintes pour la création de services web. Les principes fondamentaux de REST incluent :<text:line-break/>- L'identification des ressources par des URI ;<text:line-break/>- L'utilisation des méthodes HTTP standard (GET, POST, PUT, DELETE) ;<text:line-break/>- La représentation des ressources dans différents formats (JSON, XML) ;<text:line-break/>- La gestion d'état sans session (stateless) ;<text:line-break/>- L'utilisation de codes de statut HTTP pour les réponses.<text:line-break/><text:line-break/>Dans le cadre d'EduTrack, Spring Boot 3.4.3 est utilisé pour développer l'API REST qui expose les fonctionnalités du système. L'architecture REST permet une séparation claire entre le backend et les clients (frontend web et application mobile), facilitant ainsi la maintenance et l'évolution du système.<text:line-break/><text:line-break/>La sécurité de l'API est assurée par l'authentification JWT, qui permet une gestion sécurisée et </text:span><text:soft-page-break/><text:span text:style-name="T3">sans état des sessions utilisateur. Chaque requête authentifiée contient un token JWT qui est vérifié par le serveur avant d'autoriser l'accès aux ressources protégées.<text:line-break/><text:line-break/>Spring Data JPA est utilisé pour la couche d'accès aux données, offrant une abstraction qui simplifie les opérations de persistance et réduit le code boilerplate. Les DTOs sont utilisés pour transférer les données entre le serveur et les clients, assurant une isolation entre la couche de persistance et la couche de présentation.</text:span></text:p>
      <text:p text:style-name="P1"><text:span text:style-name="T10">II- PostgreSQL et persistance des données</text:span></text:p>
      <text:p text:style-name="P1"><text:span text:style-name="T3">PostgreSQL est un système de gestion de bases de données relationnelles open source reconnu pour sa fiabilité, sa robustesse et sa conformité aux standards SQL. Il offre des fonctionnalités avancées telles que :<text:line-break/>- La gestion des transactions ACID ;<text:line-break/>- Les contraintes d'intégrité référentielle ;<text:line-break/>- Les index avancés (B-tree, Hash, GiST, GIN) ;<text:line-break/>- Les vues et les vues matérialisées ;<text:line-break/>- Les fonctions et procédures stockées ;<text:line-break/>- La gestion des utilisateurs et des permissions.<text:line-break/><text:line-break/>Le modèle de données d'EduTrack a été conçu pour refléter la complexité des processus pédagogiques. Il comprend les principales entités suivantes :<text:line-break/>- Les utilisateurs (administrateurs, enseignants) avec gestion des rôles ;<text:line-break/>- Les entités académiques (départements, filières, niveaux d'enseignement, classes, matières) ;<text:line-break/>- Les salles de cours et les emplois du temps ;<text:line-break/>- Les séances et les émargements ;<text:line-break/>- Les fiches de progression pédagogique ;<text:line-break/>- Les honoraires et leur calcul.<text:line-break/><text:line-break/>L'utilisation de JPA et Hibernate comme ORM permet de mapper automatiquement les entités Java aux tables PostgreSQL, tout en offrant une flexibilité pour les requêtes complexes via JPQL et les requêtes natives SQL.</text:span></text:p>
      <text:p text:style-name="P6"><text:soft-page-break/><text:span text:style-name="T6">Section 2 : Technologies frontend et mobile</text:span></text:p>
      <text:p text:style-name="P1"/>
      <text:p text:style-name="P1"><text:span text:style-name="T10">I- Angular pour les interfaces web modernes</text:span></text:p>
      <text:p text:style-name="P1"><text:span text:style-name="T3">Angular est un framework de développement d'applications web développé par Google. La version 21 d'Angular, utilisée dans ce projet, offre des fonctionnalités avancées pour la création d'applications web modernes et performantes :<text:line-break/><text:line-break/>- L'architecture basée sur les composants réutilisables ;<text:line-break/>- La liaison de données bidirectionnelle (two-way data binding) ;<text:line-break/>- Le routage côté client pour les applications single-page (SPA) ;<text:line-break/>- L'injection de dépendances intégrée ;<text:line-break/>- Les observables et la programmation réactive avec RxJS ;<text:line-break/>- Le support du typage statique avec TypeScript 5.9.<text:line-break/><text:line-break/>L'interface web d'administration d'EduTrack est développée avec Angular 21 et utilise PrimeNG 21 comme bibliothèque de composants UI. PrimeNG offre une large gamme de composants prêts à l'emploi (tableaux de données, formulaires, dialogues, graphiques) qui accélèrent le développement tout en garantissant une interface cohérente et professionnelle.<text:line-break/><text:line-break/>Chart.js est intégré pour la visualisation des données statistiques, permettant d'afficher des graphiques dynamiques sur le tableau de bord. La bibliothèque angularx-qrcode permet la génération de codes QR pour l'émargement électronique.<text:line-break/><text:line-break/>L'architecture frontend suit le modèle des composants standalone d'Angular, avec une séparation claire entre les modules fonctionnels (dashboard, classes, enseignants, matières, emplois du temps, séances, émargements, etc.).</text:span></text:p>
      <text:p text:style-name="P1"><text:span text:style-name="T10">II- Ionic et développement mobile multiplateforme</text:span></text:p>
      <text:p text:style-name="P1"><text:span text:style-name="T3">Ionic est un framework de développement mobile multiplateforme qui permet de créer des applications pour iOS et Android à partir d'une base de code unique utilisant des technologies web standard (HTML, CSS, TypeScript). La version 8 d'Ionic, couplée à Angular 20, est utilisée </text:span><text:soft-page-break/><text:span text:style-name="T3">pour développer l'application mobile d'EduTrack.<text:line-break/><text:line-break/>Capacitor 8 est le runtime qui permet à l'application Ionic d'accéder aux fonctionnalités natives des appareils mobiles, telles que l'appareil photo pour le scan de QR codes, les notifications, le stockage local, et les capteurs.<text:line-break/><text:line-break/>L'application mobile d'EduTrack est destinée principalement aux enseignants. Elle offre les fonctionnalités suivantes :<text:line-break/>- La connexion sécurisée à la plateforme ;<text:line-break/>- Le scan de QR codes pour l'émargement aux séances ;<text:line-break/>- La consultation du planning des séances ;<text:line-break/>- Le cahier de textes électronique ;<text:line-break/>- L'historique des séances effectuées ;<text:line-break/>- Le profil enseignant et le suivi des honoraires.<text:line-break/><text:line-break/>L'utilisation d'Ionic permet de réduire considérablement les coûts et les délais de développement en mutualisant une partie significative du code entre les plateformes iOS et Android, tout en conservant une expérience utilisateur native.</text:span></text:p>
      <text:p text:style-name="Standard"/>
      <text:p text:style-name="P4"><text:span text:style-name="T5">Partie II : Cas pratique – Analyse, conception et implémentation d'EduTrack</text:span></text:p>
      <text:p text:style-name="P1"/>
      <text:p text:style-name="P1"><text:span text:style-name="T3">Cette seconde partie est consacrée à la mise en œuvre pratique de notre projet. Elle présente de manière détaillée l'analyse des besoins, la conception architecturale, et l'implémentation du système EduTrack. Cette partie démontre comment les concepts théoriques abordés précédemment sont appliqués concrètement pour construire un système fonctionnel répondant aux exigences spécifiques de l'INTEC SUP.</text:span></text:p>
      <text:p text:style-name="P1"><text:span text:style-name="T1">Chapitre 1 : Analyse et conception du système</text:span></text:p>
      <text:p text:style-name="P1"/>
      <text:p text:style-name="P1"><text:span text:style-name="T3">Ce chapitre présente la phase d'analyse et de conception du système EduTrack. Nous y détaillons l'identification des besoins fonctionnels et non fonctionnels, la modélisation du système à l'aide des diagrammes UML, et la définition de l'architecture globale du système.</text:span></text:p>
      <text:p text:style-name="P1"><text:span text:style-name="T6">Section 1 : Analyse des besoins et spécifications</text:span></text:p>
      <text:p text:style-name="P1"/>
      <text:p text:style-name="P1"><text:span text:style-name="T10">I- Besoins fonctionnels et non fonctionnels</text:span></text:p>
      <text:p text:style-name="P1"><text:span text:style-name="T3">L'analyse des besoins constitue la première étape cruciale du processus de développement. Elle permet d'identifier et de documenter les fonctionnalités que le système doit offrir (besoins fonctionnels) ainsi que les contraintes techniques et qualitatives auxquelles il doit satisfaire (besoins non fonctionnels).<text:line-break/><text:line-break/>Les besoins fonctionnels identifiés pour EduTrack sont regroupés par module :<text:line-break/><text:line-break/>Module Authentification et Gestion des utilisateurs :<text:line-break/>- Connexion sécurisée avec email et mot de passe ;<text:line-break/>- Gestion des profils utilisateurs (administrateur, enseignant) ;<text:line-break/>- Modification du mot de passe ;<text:line-break/>- Forçage du changement de mot de passe à la première connexion.<text:line-break/></text:span><text:soft-page-break/><text:span text:style-name="T3"><text:line-break/>Module Gestion des référentiels académiques :<text:line-break/>- Gestion des départements, filières, niveaux d'enseignement ;<text:line-break/>- Gestion des classes, matières et salles ;<text:line-break/>- Gestion des années universitaires ;<text:line-break/>- CRUD complet pour chaque entité.<text:line-break/><text:line-break/>Module Planification :<text:line-break/>- Création et gestion des emplois du temps ;<text:line-break/>- Affectation des enseignants aux séances ;<text:line-break/>- Gestion des types de récurrence (quotidien, hebdomadaire, mensuel).<text:line-break/><text:line-break/>Module Émargement :<text:line-break/>- Génération de QR codes pour chaque séance ;<text:line-break/>- Scan de QR codes via l'application mobile ;<text:line-break/>- Enregistrement des présences avec horodatage ;<text:line-break/>- Suivi des statuts d'émargement (valide, en retard, absent).<text:line-break/><text:line-break/>Module Suivi pédagogique :<text:line-break/>- Fiches de progression pédagogique ;<text:line-break/>- Cahier de textes électronique ;<text:line-break/>- Historique des séances.<text:line-break/><text:line-break/>Module Gestion des honoraires :<text:line-break/>- Calcul automatique des honoraires basé sur les heures effectuées ;<text:line-break/>- Génération des lignes d'honoraires ;<text:line-break/>- Validation et suivi des paiements.<text:line-break/><text:line-break/>Module Reporting et Statistiques :<text:line-break/>- Tableau de bord avec indicateurs clés ;<text:line-break/>- Graphiques et statistiques de présence ;<text:line-break/></text:span><text:soft-page-break/><text:span text:style-name="T3">- Rapports exportables.<text:line-break/><text:line-break/>Les besoins non fonctionnels identifiés incluent :<text:line-break/>- La sécurité : authentification JWT, chiffrement des mots de passe, contrôle d'accès par rôle ;<text:line-break/>- La performance : temps de réponse optimisé, gestion efficace des requêtes ;<text:line-break/>- La fiabilité : gestion des erreurs, logs, sauvegarde des données ;<text:line-break/>- La maintenabilité : architecture modulaire, code documenté, API documentée via Swagger ;<text:line-break/>- L'évolutivité : capacité à ajouter de nouvelles fonctionnalités ;<text:line-break/>- L'expérience utilisateur : interface intuitive, responsive design, temps de chargement réduits.</text:span></text:p>
      <text:p text:style-name="P1">Acteurs du système</text:p>
      <text:p text:style-name="P1">Le système EduTrack met principalement en relation deux catégories d’acteurs. L’administrateur assure la configuration générale de la plateforme, la gestion des référentiels, la planification des séances, la génération des QR Codes et le suivi des données pédagogiques. L’enseignant, quant à lui, consulte son planning, renseigne le cahier de textes, scanne le QR Code pour émarger et consulte son profil ainsi que l’historique de ses activités.</text:p>
      <text:p text:style-name="P1">Besoins fonctionnels</text:p>
      <text:p text:style-name="P1">Les besoins fonctionnels retenus sont : authentification sécurisée, gestion des utilisateurs, gestion des enseignants, gestion des départements et filières, gestion des classes et matières, gestion des salles, planification des séances, génération de QR Codes, saisie du cahier de textes, scan d’émargement, consultation des historiques et préparation du suivi des honoraires.</text:p>
      <text:p text:style-name="P1">Besoins non fonctionnels</text:p>
      <text:p text:style-name="P1">Les besoins non fonctionnels concernent la sécurité, la traçabilité, l’ergonomie, la maintenabilité, la disponibilité et l’évolutivité. Le système doit protéger les accès par JWT, conserver des données cohérentes en base PostgreSQL, offrir des interfaces simples et permettre de futures extensions, notamment pour la génération de rapports et l’automatisation complète des honoraires.</text:p>
      <text:p text:style-name="P1">Tableau 1 : synthèse des besoins fonctionnels</text:p>
      <text:p text:style-name="P1">Administrateur : gérer les référentiels, créer les comptes, planifier les séances, générer les QR Codes, suivre les émargements et valider les données pédagogiques.</text:p>
      <text:p text:style-name="P1">Enseignant : se connecter, consulter son planning, remplir le cahier de textes, scanner le QR Code, consulter son historique et gérer son profil.</text:p>
      <text:p text:style-name="P1">Système : sécuriser les accès, centraliser les données, contrôler la cohérence des informations et exposer les services via une API REST.</text:p>
      <text:p text:style-name="P1"><text:span text:style-name="T10">II- Diagrammes UML et modélisation</text:span></text:p>
      <text:p text:style-name="P1"><text:span text:style-name="T3">La modélisation UML a été utilisée pour représenter graphiquement les différents aspects du système. Les diagrammes suivants ont été élaborés :<text:line-break/><text:line-break/>Le diagramme de cas d'utilisation identifie les interactions entre les acteurs du système (administrateur et enseignant) et les fonctionnalités disponibles. L'administrateur peut gérer les référentiels, planifier les séances, générer les QR codes, consulter les statistiques et gérer les honoraires. L'enseignant peut consulter son planning, scanner les QR codes pour émarger, renseigner son cahier de textes et consulter son historique et ses honoraires.<text:line-break/><text:line-break/>Le diagramme de classes constitue le modèle de données du système. Il définit les entités principales et leurs relations : Utilisateur (avec ses sous-types Administrateur et Enseignant), Département, Filière, NiveauEnseignement, Classe, Matière, Salle, EmploiDuTemps, Séance, Emargement, FicheProgression, HonorairesCalculs, et LignesHonoraires.<text:line-break/><text:line-break/>Le diagramme de séquence illustre le flux d'interactions pour le scénario d'émargement par QR code : l'enseignant ouvre l'application mobile, scanne le QR code de la séance, le système vérifie la validité du code, enregistre l'émargement avec horodatage, et confirme l'opération à l'enseignant.<text:line-break/><text:line-break/>Le diagramme de déploiement montre l'architecture physique du système : le serveur backend Spring Boot déployé sur un serveur d'application, la base de données PostgreSQL, le client web </text:span><text:soft-page-break/><text:span text:style-name="T3">Angular accessible via navigateur, et l'application mobile Ionic déployée sur les appareils des enseignants.</text:span></text:p>
      <text:p text:style-name="P7"><draw:frame draw:style-name="fr1" draw:name="Picture 1" text:anchor-type="as-char" ns2:width="13.97cm" ns2:height="10.469cm" draw:z-index="0"><draw:image xlink:href="Pictures/1000000100000946000006F376FC3D3D.png" xlink:type="simple" xlink:show="embed" xlink:actuate="onLoad" draw:mime-type="image/png"/></draw:frame></text:p>
      <text:p text:style-name="P8"><text:span text:style-name="T11">Figure 1 : Diagramme de cas d'utilisation du système EduTrack</text:span></text:p>
      <text:p text:style-name="P1"><text:span text:style-name="T6">Section 2 : Architecture du système</text:span></text:p>
      <text:p text:style-name="P1"/>
      <text:p text:style-name="P1"><text:span text:style-name="T10">I- Architecture globale et composants</text:span></text:p>
      <text:p text:style-name="P1"><text:span text:style-name="T3">L'architecture d'EduTrack suit le modèle client-serveur en trois couches :<text:line-break/><text:line-break/>La couche de présentation est constituée de deux clients distincts :<text:line-break/>- Le frontend web (Angular 21) destiné à l'administration, accessible via un navigateur ;<text:line-break/>- L'application mobile (Ionic 8) destinée aux enseignants.<text:line-break/><text:line-break/>La couche API regroupe l'ensemble des services REST exposés par le backend Spring Boot. Elle assure la communication entre les clients et la couche de données. La documentation de l'API est </text:span><text:soft-page-break/><text:span text:style-name="T3">générée automatiquement via Swagger/OpenAPI, facilitant l'intégration et le test des endpoints.<text:line-break/><text:line-break/>La couche de données est constituée de la base de données PostgreSQL qui centralise l'ensemble des informations du système. L'accès aux données est géré via Spring Data JPA et Hibernate, assurant une abstraction complète entre le code métier et le système de gestion de base de données.<text:line-break/><text:line-break/>Le flux de données suit le schéma suivant :<text:line-break/>- Le client envoie une requête HTTP authentifiée (JWT) au serveur ;<text:line-break/>- Le contrôleur Spring Boot reçoit la requête et délègue le traitement au service approprié ;<text:line-break/>- Le service exécute la logique métier et interagit avec le repository ;<text:line-break/>- Le repository utilise Spring Data JPA pour interroger la base de données ;<text:line-break/>- La réponse est renvoyée au client au format JSON.<text:line-break/><text:line-break/>Cette architecture en couches offre plusieurs avantages : la séparation des préoccupations, la réutilisabilité des composants, la facilité de test et de maintenance, et la possibilité d'évoluer indépendamment chaque couche.</text:span></text:p>
      <text:p text:style-name="P7"><text:soft-page-break/><draw:frame draw:style-name="fr1" draw:name="Picture 2" text:anchor-type="as-char" ns2:width="13.97cm" ns2:height="10.13cm" draw:z-index="1"><draw:image xlink:href="Pictures/10000001000008830000062CFD9F2BFE.png" xlink:type="simple" xlink:show="embed" xlink:actuate="onLoad" draw:mime-type="image/png"/></draw:frame></text:p>
      <text:p text:style-name="P8"><text:span text:style-name="T11">Figure 2 : Architecture en trois couches du système EduTrack</text:span></text:p>
      <text:p text:style-name="P1"><text:span text:style-name="T10">II- Modèle de données et API REST</text:span></text:p>
      <text:p text:style-name="P1"><text:span text:style-name="T3">Le modèle de données d'EduTrack a été conçu pour répondre aux exigences fonctionnelles identifiées. Il comprend les principales entités suivantes, avec leurs relations :<text:line-break/><text:line-break/>Un Département regroupe plusieurs Filières, qui elles-mêmes sont associées à des Niveaux d'Enseignement. Chaque combinaison de Filière et Niveau constitue une Classe. Les Matières sont associées aux Classes via les emplois du temps.<text:line-break/><text:line-break/>Un Enseignant (sous-type d'Utilisateur) est caractérisé par un matricule, un grade, une spécialité et une date d'embauche. Il peut être affecté à plusieurs séances.<text:line-break/><text:line-break/>Une Séance est planifiée dans le cadre d'un EmploiDuTemps, avec des informations sur la date, la classe, la matière, la salle, l'enseignant, le type de récurrence et le statut de la séance.<text:line-break/><text:line-break/>Un Emargement est associé à une Séance et enregistre la présence de l'enseignant avec un code </text:span><text:soft-page-break/><text:span text:style-name="T3">QR, une date de scan, un statut (valide, en retard, absent) et une localisation éventuelle.<text:line-break/><text:line-break/>Les Fiches de Progression sont liées aux séances et permettent de suivre l'avancement du programme pédagogique.<text:line-break/><text:line-break/>Le calcul des Honoraires est basé sur les heures effectuées, avec des lignes d'honoraires détaillant le nombre d'heures, le taux applicable et le montant calculé pour chaque enseignant et chaque période.<text:line-break/><text:line-break/>L'API REST expose des endpoints pour chaque entité, organisés par ressource :<text:line-break/>- /api/auth/* : Authentification et gestion des tokens JWT ;<text:line-break/>- /api/utilisateurs/* : Gestion des utilisateurs ;<text:line-break/>- /api/enseignants/* : Gestion des enseignants ;<text:line-break/>- /api/classes/*, /api/matieres/*, /api/filieres/*, etc. : Gestion des référentiels ;<text:line-break/>- /api/emplois-du-temps/*, /api/seances/* : Planification ;<text:line-break/>- /api/emargements/* : Gestion des émargements ;<text:line-break/>- /api/qrcodes/* : Génération des QR codes ;<text:line-break/>- /api/honoraires/* : Gestion des honoraires ;<text:line-break/>- /api/fiches-progression/* : Suivi pédagogique.</text:span></text:p>
      <text:p text:style-name="P7"><text:soft-page-break/><draw:frame draw:style-name="fr1" draw:name="Picture 3" text:anchor-type="as-char" ns2:width="13.97cm" ns2:height="25.665cm" draw:z-index="2"><draw:image xlink:href="Pictures/10000000000009860000117FE1DE0EA7.png" xlink:type="simple" xlink:show="embed" xlink:actuate="onLoad" draw:mime-type="image/png"/></draw:frame></text:p>
      <text:p text:style-name="P8"><text:soft-page-break/><text:span text:style-name="T11">Figure 3 : Diagramme de classes du modèle de données EduTrack</text:span></text:p>
      <text:p text:style-name="Standard"/>
      <text:p text:style-name="P4"><text:span text:style-name="T1">Chapitre 2 : Implémentation et validation</text:span></text:p>
      <text:p text:style-name="P1"/>
      <text:p text:style-name="P1"><text:span text:style-name="T3">Ce chapitre détaille la phase d'implémentation du système EduTrack, en présentant les aspects techniques du développement backend, frontend web et mobile. Il aborde également la phase de tests et de validation du système.</text:span></text:p>
      <text:p text:style-name="P1"><text:span text:style-name="T6">Section 1 : Implémentation du backend et frontend web</text:span></text:p>
      <text:p text:style-name="P1"/>
      <text:p text:style-name="P1"><text:span text:style-name="T10">I- Développement backend avec Spring Boot</text:span></text:p>
      <text:p text:style-name="P1"><text:span text:style-name="T3">Le backend d'EduTrack a été développé avec Spring Boot 3.4.3 en utilisant Java. La structure du projet suit une architecture en couches classique :<text:line-break/><text:line-break/>La couche des contrôleurs (package controllers) expose les endpoints REST. Chaque contrôleur est annoté avec @RestController et définit les points d'entrée pour les opérations CRUD et les fonctionnalités spécifiques. Par exemple, AuthController gère l'authentification, SeanceController gère les séances, et EmargementController gère les émargements.<text:line-break/><text:line-break/>La couche des services contient la logique métier de l'application. Les services sont annotés avec @Service et implémentent les règles de gestion, telles que le calcul des honoraires en fonction des heures effectuées, la validation des émargements, et la génération des QR codes.<text:line-break/><text:line-break/>La couche de persistance (repositories) utilise Spring Data JPA avec des interfaces étendant JpaRepository. Cela permet d'effectuer des opérations CRUD sans implémentation explicite, tout en offrant la possibilité de définir des requêtes personnalisées.<text:line-break/><text:line-break/>La couche des entités (package Entities) définit les classes Java mappées aux tables de la base de données via JPA. Les relations entre entités sont gérées avec les annotations @OneToMany, @ManyToOne, @ManyToMany. L'héritage est utilisé pour la relation entre Utilisateur et Enseignant.<text:line-break/><text:line-break/></text:span><text:soft-page-break/><text:span text:style-name="T3">La sécurité est implémentée via Spring Security avec JWT. Le filtre JwtAuthenticationFilter intercepte chaque requête, extrait le token JWT de l'en-tête Authorization, et valide son authenticité avant d'autoriser l'accès à la ressource demandée.<text:line-break/><text:line-break/>La configuration CORS a été mise en place pour autoriser les requêtes provenant du frontend Angular et de l'application mobile. Swagger/OpenAPI a été intégré via springdoc-openapi pour générer automatiquement la documentation interactive de l'API, accessible via /swagger-ui.html.<text:line-break/><text:line-break/>Un DataSeeder a été développé pour initialiser la base de données avec des données de démonstration, facilitant ainsi les tests et la validation du système.</text:span></text:p>
      <text:p text:style-name="P1"><text:span text:style-name="T10">II- Développement frontend avec Angular</text:span></text:p>
      <text:p text:style-name="P1"><text:span text:style-name="T3">Le frontend web d'EduTrack a été développé avec Angular 21 et PrimeNG 21. L'application suit une architecture modulaire avec des composants standalone :<text:line-break/><text:line-break/>L'architecture de l'application frontend est organisée comme suit :<text:line-break/>- Le dossier core/ contient les services partagés (auth.service, teacher.service, classe.service, etc.), les modèles de données et les intercepteurs HTTP ;<text:line-break/>- Le dossier layout/ contient le composant Sidebar pour la navigation ;<text:line-break/>- Le dossier features/ regroupe les modules fonctionnels (dashboard, login, classes, teachers, matieres, schedule, seances, attendance, qr-generator, etc.).<text:line-break/><text:line-break/>Le routage est géré via Angular Router avec lazy loading pour les modules fonctionnels, ce qui optimise le temps de chargement initial de l'application.<text:line-break/><text:line-break/>L'authentification est gérée côté client par le AuthService qui stocke le token JWT dans le localStorage et l'attache automatiquement à chaque requête via un intercepteur HTTP. Un AuthGuard protège les routes nécessitant une authentification.<text:line-break/><text:line-break/>L'interface utilisateur du tableau de bord présente des statistiques clés : nombre d'enseignants, de classes, de séances planifiées et taux de présence. Ces données sont actualisées périodiquement pour offrir une vue en temps réel de l'activité pédagogique.<text:line-break/></text:span><text:soft-page-break/><text:span text:style-name="T3"><text:line-break/>La génération de QR codes utilise la bibliothèque angularx-qrcode pour produire des codes QR uniques pour chaque séance. Ces codes sont ensuite scannés par l'application mobile pour l'émargement.<text:line-break/><text:line-break/>L'interface de gestion des enseignants permet d'ajouter, modifier, supprimer et consulter les informations des enseignants, avec des fonctionnalités de recherche et de filtrage avancées.</text:span></text:p>
      <text:p text:style-name="P1"><text:span text:style-name="T6">Section 2 : Implémentation mobile et tests</text:span></text:p>
      <text:p text:style-name="P1"/>
      <text:p text:style-name="P1"><text:span text:style-name="T10">I- Développement mobile avec Ionic/Capacitor</text:span></text:p>
      <text:p text:style-name="P1"><text:span text:style-name="T3">L'application mobile EduTrack a été développée avec Ionic 8 et Angular 20, en utilisant Capacitor 8 pour l'accès aux fonctionnalités natives.<text:line-break/><text:line-break/>L'architecture de l'application mobile comprend les pages suivantes :<text:line-break/>- La page Login permet à l'enseignant de s'authentifier avec ses identifiants ;<text:line-break/>- La page Planning affiche le calendrier des séances à venir de l'enseignant ;<text:line-break/>- La page Scan QR utilise l'appareil photo du téléphone pour scanner les codes QR et enregistrer la présence ;<text:line-break/>- La page Cahier de Textes permet à l'enseignant de renseigner le contenu de ses séances ;<text:line-break/>- La page Historique liste les séances passées avec leur statut d'émargement ;<text:line-break/>- La page Profil affiche les informations de l'enseignant et le suivi de ses honoraires.<text:line-break/><text:line-break/>La navigation est organisée avec des tabs (onglets) pour un accès rapide aux fonctionnalités principales. Le seance.service.ts centralise les appels API pour la gestion des séances et des émargements.<text:line-break/><text:line-break/>Le scan de QR codes utilise le plugin Capacitor Camera pour capturer l'image du code QR, et la bibliothèque de décodage intégrée pour extraire les informations de la séance. L'émargement est ensuite envoyé au backend pour validation et enregistrement.<text:line-break/><text:line-break/></text:span><text:soft-page-break/><text:span text:style-name="T3">L'interface utilisateur mobile a été conçue pour offrir une expérience fluide et intuitive, adaptée aux usages des enseignants en déplacement.</text:span></text:p>
      <text:p text:style-name="P7"><draw:frame draw:style-name="fr1" draw:name="Picture 4" text:anchor-type="as-char" ns2:width="13.97cm" ns2:height="9.742cm" draw:z-index="3"><draw:image xlink:href="Pictures/10000001000007BB00000564C7B310E1.png" xlink:type="simple" xlink:show="embed" xlink:actuate="onLoad" draw:mime-type="image/png"/></draw:frame></text:p>
      <text:p text:style-name="P8"><text:span text:style-name="T11">Figure 4 : Diagramme de séquence du processus d'émargement par QR Code</text:span></text:p>
      <text:p text:style-name="P1"><text:span text:style-name="T10">II- Tests et validation du système</text:span></text:p>
      <text:p text:style-name="P1"><text:span text:style-name="T3">La phase de tests et de validation est essentielle pour garantir la qualité et la fiabilité du système EduTrack. Plusieurs types de tests ont été réalisés :<text:line-break/><text:line-break/>Les tests unitaires ont été écrits pour vérifier le bon fonctionnement des services et des contrôleurs backend. Spring Boot fournit un support complet pour les tests avec @SpringBootTest, @WebMvcTest et @DataJpaTest.<text:line-break/><text:line-break/>Les tests d'intégration ont permis de valider les interactions entre les différentes couches du système : communication entre le frontend et le backend via les endpoints REST, persistance et récupération des données en base, et flux d'authentification complet.<text:line-break/><text:line-break/>Les tests fonctionnels ont été réalisés pour vérifier que chaque fonctionnalité répond aux </text:span><text:soft-page-break/><text:span text:style-name="T3">spécifications définies : création d'un enseignant, planification d'une séance, génération d'un QR code, scan et émargement, calcul des honoraires.<text:line-break/><text:line-break/>Les tests de sécurité ont porté sur la validation des tokens JWT, la protection des endpoints par rôle, et la prévention des accès non autorisés.<text:line-break/><text:line-break/>Les tests de performance ont été effectués pour s'assurer que les temps de réponse de l'API restent acceptables, même en cas de charge importante.<text:line-break/><text:line-break/>Enfin, des tests utilisateurs ont été menés avec des enseignants et des administrateurs pour valider l'ergonomie et l'expérience utilisateur des interfaces web et mobile.</text:span></text:p>
      <text:p text:style-name="P1">Tableau 2 : scénarios de tests fonctionnels</text:p>
      <text:p text:style-name="P1">Authentification : saisie d’un email et d’un mot de passe valides ; résultat attendu : accès autorisé selon le rôle.</text:p>
      <text:p text:style-name="P1">Gestion des référentiels : création, modification et suppression d’une classe, d’une matière ou d’une salle ; résultat attendu : données enregistrées et affichées correctement.</text:p>
      <text:p text:style-name="P1">Planification : création d’une séance associée à un enseignant, une classe, une salle et une matière ; résultat attendu : séance disponible dans le planning.</text:p>
      <text:p text:style-name="P1">Cahier de textes : saisie du contenu détaillé, des objectifs et des travaux ; résultat attendu : fiche de progression enregistrée.</text:p>
      <text:p text:style-name="P1">Émargement QR Code : scan d’un token valide par l’enseignant ; résultat attendu : émargement enregistré avec date, heure et position approximative.</text:p>
      <text:p text:style-name="P1">Limites du système</text:p>
      <text:p text:style-name="P1">Malgré les fonctionnalités réalisées, certaines limites subsistent. Le calcul automatisé complet des honoraires nécessite encore des règles de gestion plus détaillées selon les types d’enseignants, les volumes horaires et les éventuelles majorations. Le contrôle de géolocalisation peut aussi dépendre de la précision du terminal utilisé. Enfin, le déploiement en production nécessitera une configuration sécurisée des secrets, du serveur et de la base de données.</text:p>
      <text:p text:style-name="P1">Perspectives</text:p>
      <text:p text:style-name="P1">Les perspectives d’amélioration portent sur l’ajout de notifications automatiques, la génération de rapports PDF, l’export Excel des données pédagogiques, l’intégration d’un module complet de calcul et de paiement des honoraires, ainsi que le déploiement cloud de la plateforme.</text:p>
      <text:p text:style-name="Standard"/>
      <text:p text:style-name="P4"><text:span text:style-name="T5">Conclusion</text:span></text:p>
      <text:p text:style-name="P1"/>
      <text:p text:style-name="P1">Ce mémoire avait pour objectif de concevoir et développer un système intégré de suivi pédagogique et de gestion des honoraires des enseignants pour l’INTEC SUP. À travers EduTrack, nous avons proposé une solution numérique reposant sur une API REST sécurisée, une interface web d’administration et une application mobile destinée aux enseignants.</text:p>
      <text:p text:style-name="P1">Le système réalisé permet de gérer les principaux référentiels pédagogiques, de planifier les séances, de renseigner le cahier de textes, de générer des QR Codes et de réaliser l’émargement mobile. Ces fonctionnalités contribuent à améliorer la traçabilité des activités pédagogiques et à fournir une base fiable pour le suivi administratif et financier.</text:p>
      <text:p text:style-name="P1">Les tests effectués montrent que les principaux scénarios fonctionnels sont opérationnels. Toutefois, le projet peut encore être amélioré par l’intégration d’un module avancé de calcul des honoraires, la génération automatique de rapports, le renforcement des contrôles de sécurité et le déploiement de la solution dans un environnement de production.</text:p>
      <text:p text:style-name="P1">En définitive, EduTrack constitue une réponse concrète aux difficultés liées au suivi pédagogique manuel. Il démontre l’intérêt des technologies web et mobiles modernes dans la transformation numérique des établissements d’enseignement supérieur.</text:p>
      <text:p text:style-name="P9"><text:span text:style-name="T5">Bibliographie</text:span></text:p>
      <text:p text:style-name="P1"/>
      <text:p text:style-name="P6"><text:span text:style-name="T6">Ouvrages</text:span></text:p>
      <text:p text:style-name="P1"><text:span text:style-name="T3">• WALLS Craig : « Spring Boot in Practice », Manning Publications, New York, 2022, 350 pages.</text:span></text:p>
      <text:p text:style-name="P1"><text:span text:style-name="T3">• DEITEL Paul et DEITEL Harvey : « Java: How to Program », 11e édition, Pearson, Londres, 2018, 1240 pages.</text:span></text:p>
      <text:p text:style-name="P1"><text:span text:style-name="T3">• FOWLER Martin : « UML Distilled: A Brief Guide to the Standard Object Modeling Language », 3e édition, Addison-Wesley, Boston, 2004, 208 pages.</text:span></text:p>
      <text:p text:style-name="P1"><text:span text:style-name="T3">• NEWMAN Sam : « Building Microservices: Designing Fine-Grained Systems », O'Reilly Media, Sebastopol, 2015, 280 pages.</text:span></text:p>
      <text:p text:style-name="P1"/>
      <text:p text:style-name="P1"><text:span text:style-name="T6">Articles et documentation technique</text:span></text:p>
      <text:p text:style-name="P1"><text:span text:style-name="T3">• SPRING IO : « Spring Boot Reference Documentation », https://docs.spring.io/spring-boot/docs/current/reference/html/, consulté le 15 mars 2026.</text:span></text:p>
      <text:p text:style-name="P1"><text:span text:style-name="T3">• ANGULAR : « Angular Documentation », https://angular.dev/docs, consulté le 20 mars 2026.</text:span></text:p>
      <text:p text:style-name="P1"><text:span text:style-name="T3">• IONIC : « Ionic Framework Documentation », https://ionicframework.com/docs, consulté le 25 mars 2026.</text:span></text:p>
      <text:p text:style-name="P1"><text:span text:style-name="T3">• CAPACITOR : « Capacitor Documentation », https://capacitorjs.com/docs, consulté le 25 mars 2026.</text:span></text:p>
      <text:p text:style-name="P1"><text:span text:style-name="T3">• POSTGRESQL : « PostgreSQL Documentation », https://www.postgresql.org/docs/, consulté le 15 mars 2026.</text:span></text:p>
      <text:p text:style-name="P1"/>
      <text:p text:style-name="P1"><text:span text:style-name="T6">Cours</text:span></text:p>
      <text:p text:style-name="P1"><text:span text:style-name="T3">• M. KOME Moctar : « Cours de méthodologie de recherche et de rédaction », INTEC SUP, Bamako, année universitaire 2025-2026.</text:span></text:p>
      <text:p text:style-name="Standard"><text:soft-page-break/></text:p>
      <text:p text:style-name="P4"><text:span text:style-name="T5">Glossaire</text:span></text:p>
      <text:p text:style-name="P1"/>
      <text:p text:style-name="P10"><text:span text:style-name="T12">API : </text:span><text:span text:style-name="T13">Application Programming Interface (Interface de programmation applicative)</text:span></text:p>
      <text:p text:style-name="P10"><text:span text:style-name="T12">CRUD : </text:span><text:span text:style-name="T13">Create, Read, Update, Delete (Créer, Lire, Mettre à jour, Supprimer)</text:span></text:p>
      <text:p text:style-name="P10"><text:span text:style-name="T12">DDL : </text:span><text:span text:style-name="T13">Data Definition Language (Langage de définition de données)</text:span></text:p>
      <text:p text:style-name="P10"><text:span text:style-name="T12">DTO : </text:span><text:span text:style-name="T13">Data Transfer Object (Objet de transfert de données)</text:span></text:p>
      <text:p text:style-name="P10"><text:span text:style-name="T12">HTTP : </text:span><text:span text:style-name="T13">HyperText Transfer Protocol (Protocole de transfert hypertexte)</text:span></text:p>
      <text:p text:style-name="P10"><text:span text:style-name="T12">IDE : </text:span><text:span text:style-name="T13">Integrated Development Environment (Environnement de développement intégré)</text:span></text:p>
      <text:p text:style-name="P10"><text:span text:style-name="T12">JDK : </text:span><text:span text:style-name="T13">Java Development Kit (Kit de développement Java)</text:span></text:p>
      <text:p text:style-name="P10"><text:span text:style-name="T12">JPA : </text:span><text:span text:style-name="T13">Jakarta Persistence API (API de persistance Jakarta)</text:span></text:p>
      <text:p text:style-name="P10"><text:span text:style-name="T12">JSON : </text:span><text:span text:style-name="T13">JavaScript Object Notation (Notation objet JavaScript)</text:span></text:p>
      <text:p text:style-name="P10"><text:span text:style-name="T12">JWT : </text:span><text:span text:style-name="T13">JSON Web Token (Jeton web JSON)</text:span></text:p>
      <text:p text:style-name="P10"><text:span text:style-name="T12">JVM : </text:span><text:span text:style-name="T13">Java Virtual Machine (Machine virtuelle Java)</text:span></text:p>
      <text:p text:style-name="P10"><text:span text:style-name="T12">MVC : </text:span><text:span text:style-name="T13">Model-View-Controller (Modèle-Vue-Contrôleur)</text:span></text:p>
      <text:p text:style-name="P10"><text:span text:style-name="T12">ORM : </text:span><text:span text:style-name="T13">Object-Relational Mapping (Mapping objet-relationnel)</text:span></text:p>
      <text:p text:style-name="P10"><text:span text:style-name="T12">PFE : </text:span><text:span text:style-name="T13">Projet de Fin d'Études</text:span></text:p>
      <text:p text:style-name="P10"><text:span text:style-name="T12">REST : </text:span><text:span text:style-name="T13">Representational State Transfer (Transfert d'état représentationnel)</text:span></text:p>
      <text:p text:style-name="P10"><text:span text:style-name="T12">SPA : </text:span><text:span text:style-name="T13">Single Page Application (Application monopage)</text:span></text:p>
      <text:p text:style-name="P10"><text:span text:style-name="T12">SQL : </text:span><text:span text:style-name="T13">Structured Query Language (Langage de requête structuré)</text:span></text:p>
      <text:p text:style-name="P10"><text:span text:style-name="T12">UML : </text:span><text:span text:style-name="T13">Unified Modeling Language (Langage de modélisation unifié)</text:span></text:p>
      <text:p text:style-name="P1"><text:span text:style-name="T12">UX : </text:span><text:span text:style-name="T13">User Experience (Expérience utilisateur)</text:span></text:p>
      <text:p text:style-name="P1">Annexes</text:p>
      <text:p text:style-name="P1">Annexe 1 : guide d’installation</text:p>
      <text:p text:style-name="P1">Backend : se placer dans backend/edutrack, configurer PostgreSQL, puis lancer l’application Spring Boot sur le port 8099.</text:p>
      <text:p text:style-name="P1">Frontend web : se placer dans frontend-web, installer les dépendances avec npm install, puis lancer ng serve sur le port 4200.</text:p>
      <text:p text:style-name="P1">Application mobile : se placer dans mobile-ionic, installer les dépendances avec npm install, puis lancer ng serve ou ionic serve sur le port 8100.</text:p>
      <text:p text:style-name="P1">Annexe 2 : principaux endpoints API</text:p>
      <text:p text:style-name="P1">/api/auth/login : authentification des utilisateurs ; /api/classes : gestion des classes ; /api/matieres : gestion des matières ; /api/seances : gestion des séances ; /api/emargements/scan : émargement QR Code ; /api/fiche-progression : gestion du cahier de textes.</text:p>
      <text:p text:style-name="P1">Annexe 3 : comptes de démonstration</text:p>
      <text:p text:style-name="P1">Compte administrateur de développement : permet d’accéder à l’interface web d’administration. Compte enseignant de démonstration : permet de tester le planning, le cahier de textes et l’émargement mobile. Ces comptes doivent être changés ou désactivés avant tout déploiement en production.</text:p>
      <text:p text:style-name="P11"><text:span text:style-name="T5">Table des matières</text:span></text:p>
      <text:p text:style-name="P1"/>
      <text:p text:style-name="P1"><text:span text:style-name="T3">Dédicace</text:span></text:p>
      <text:p text:style-name="P1"><text:span text:style-name="T3">Remerciements</text:span></text:p>
      <text:p text:style-name="P1"><text:span text:style-name="T3">Sommaire</text:span></text:p>
      <text:p text:style-name="P1"><text:span text:style-name="T3">Résumé</text:span></text:p>
      <text:p text:style-name="P1"><text:span text:style-name="T3">Introduction</text:span></text:p>
      <text:p text:style-name="P1"><text:span text:style-name="T3">Partie I : Cadre théorique</text:span></text:p>
      <text:p text:style-name="P1"><text:span text:style-name="T3"><text:s text:c="2"/>Chapitre 1 : Généralités sur les systèmes de suivi pédagogique</text:span></text:p>
      <text:p text:style-name="P1"><text:span text:style-name="T3"><text:s text:c="4"/>Section 1 : Concepts fondamentaux de la gestion pédagogique</text:span></text:p>
      <text:p text:style-name="P1"><text:span text:style-name="T3"><text:s text:c="4"/>Section 2 : La gestion des honoraires des enseignants</text:span></text:p>
      <text:p text:style-name="P1"><text:span text:style-name="T3"><text:s text:c="2"/>Chapitre 2 : Technologies et architectures de développement</text:span></text:p>
      <text:p text:style-name="P1"><text:span text:style-name="T3"><text:s text:c="4"/>Section 1 : Technologies backend et bases de données</text:span></text:p>
      <text:p text:style-name="P1"><text:span text:style-name="T3"><text:s text:c="4"/>Section 2 : Technologies frontend et mobile</text:span></text:p>
      <text:p text:style-name="P1"><text:span text:style-name="T3">Partie II : Cas pratique – Analyse, conception et implémentation d'EduTrack</text:span></text:p>
      <text:p text:style-name="P1"><text:span text:style-name="T3"><text:s text:c="2"/>Chapitre 1 : Analyse et conception du système</text:span></text:p>
      <text:p text:style-name="P1"><text:span text:style-name="T3"><text:s text:c="4"/>Section 1 : Analyse des besoins et spécifications</text:span></text:p>
      <text:p text:style-name="P1"><text:span text:style-name="T3"><text:s text:c="4"/>Section 2 : Architecture du système</text:span></text:p>
      <text:p text:style-name="P1"><text:span text:style-name="T3"><text:s text:c="2"/>Chapitre 2 : Implémentation et validation</text:span></text:p>
      <text:p text:style-name="P1"><text:span text:style-name="T3"><text:s text:c="4"/>Section 1 : Implémentation du backend et frontend web</text:span></text:p>
      <text:p text:style-name="P1"><text:span text:style-name="T3"><text:s text:c="4"/>Section 2 : Implémentation mobile et tests</text:span></text:p>
      <text:p text:style-name="P1"><text:span text:style-name="T3">Conclusion</text:span></text:p>
      <text:p text:style-name="P1"><text:span text:style-name="T3">Bibliographie</text:span></text:p>
      <text:p text:style-name="P1"><text:span text:style-name="T3">Glossaire</text:span></text:p>
      <text:p text:style-name="P1"><text:soft-page-break/><text:span text:style-name="T3">Annexes</text:span></text:p>
    </office:text>
  </office:body>
</office:document-content>
</file>

<file path=styles.xml><?xml version="1.0" encoding="utf-8"?>
<office:document-styles xmlns:draw="urn:oasis:names:tc:opendocument:xmlns:drawing:1.0" xmlns:fo="urn:oasis:names:tc:opendocument:xmlns:xsl-fo-compatible:1.0" xmlns:ns2="urn:oasis:names:tc:opendocument:xmlns:svg-compatible:1.0" xmlns:ns4="urn:org:documentfoundation:names:experimental:office:xmlns:loext:1.0" xmlns:office="urn:oasis:names:tc:opendocument:xmlns:office:1.0" xmlns:style="urn:oasis:names:tc:opendocument:xmlns:style:1.0" xmlns:table="urn:oasis:names:tc:opendocument:xmlns:table:1.0" xmlns:text="urn:oasis:names:tc:opendocument:xmlns:text:1.0" office:version="1.4">
  <office:font-face-decls>
    <style:font-face style:name="Calibri" ns2:font-family="Calibri" style:font-family-generic="roman" style:font-pitch="variable"/>
    <style:font-face style:name="Cambria" ns2:font-family="Cambria" style:font-family-generic="roman" style:font-pitch="variable"/>
    <style:font-face style:name="Courier" ns2:font-family="Courier" style:font-family-generic="roman" style:font-pitch="variable"/>
    <style:font-face style:name="F" ns2:font-family="" style:font-family-generic="system" style:font-pitch="variable"/>
    <style:font-face style:name="Liberation Sans" ns2:font-family="'Liberation Sans'" style:font-family-generic="swiss" style:font-pitch="variable"/>
    <style:font-face style:name="Noto Sans CJK SC" ns2:font-family="'Noto Sans CJK SC'" style:font-family-generic="system" style:font-pitch="variable"/>
    <style:font-face style:name="Noto Sans Devanagari" ns2:font-family="'Noto Sans Devanagari'" style:font-family-generic="swiss"/>
    <style:font-face style:name="Noto Sans Devanagari1" ns2:font-family="'Noto Sans Devanagari'" style:font-family-generic="system" style:font-pitch="variable"/>
    <style:font-face style:name="Times New Roman" ns2:font-family="'Times New Roman'" style:font-family-generic="roman" style:font-pitch="variable"/>
    <style:font-face style:name="ＭＳ ゴシック" ns2:font-family="'ＭＳ ゴシック'" style:font-family-generic="system" style:font-pitch="variable"/>
    <style:font-face style:name="ＭＳ 明朝" ns2: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ns4:gradient-stop ns2:offset="0" ns4:color-type="rgb" ns4:color-value="#000000"/>
      <ns4:gradient-stop ns2:offset="1" ns4:color-type="rgb" ns4:color-value="#ffffff"/>
    </draw:gradient>
    <draw:hatch draw:name="Red_20_90_20_Degrees_20_Crossed_20_1" draw:display-name="Red 90 Degrees Crossed 1" draw:style="single" draw:color="#3465a4" draw:distance="0.02cm" draw:rotation="0"/>
    <style:default-style style:family="graphic">
      <style:graphic-properties ns2: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ns4:tab-stop-distance="0cm" style:writing-mode="lr-tb" style:font-independent-line-spacing="false">
        <style:tab-stops/>
      </style:paragraph-properties>
      <style:text-properties style:use-window-font-color="true" ns4: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ns4:hyphenation-keep-type="column" ns4:hyphenation-keep-line="false" style:text-autospace="ideograph-alpha" style:punctuation-wrap="hanging" style:line-break="strict" style:tab-stop-distance="1.27cm" style:writing-mode="page"/>
      <style:text-properties style:use-window-font-color="true" ns4: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ns4:hyphenation-no-caps="false" ns4:hyphenation-no-last-word="false" ns4:hyphenation-word-char-count="5" ns4: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50%" fo:text-align="lef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ns4: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212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ns4:opacity="100%" fo:font-size="9pt" fo:font-weight="bold" style:font-size-asian="9pt" style:font-weight-asian="bold" style:font-size-complex="9pt" style:font-weight-complex="bold">
        <ns4:char-complex-color ns4:theme-type="accent1" ns4: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ns4: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ns4: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ns4:linked-style-name="Heading_20_1_20_Char" style:default-outline-level="1" style:list-style-name="" style:class="chapter">
      <style:paragraph-properties fo:margin-top="0.847cm" fo:margin-bottom="0cm" style:contextual-spacing="false" fo:keep-together="always" fo:keep-with-next="always"/>
      <style:text-properties fo:color="#365f91" ns4: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ns4:char-complex-color ns4:theme-type="accent1" ns4:color-type="theme">
          <ns4:transformation ns4:type="shade" ns4:value="2509"/>
        </ns4:char-complex-color>
      </style:text-properties>
    </style:style>
    <style:style style:name="Heading_20_2" style:display-name="Heading 2" style:family="paragraph" style:parent-style-name="Standard" style:next-style-name="Standard" ns4:linked-style-name="Heading_20_2_20_Char" style:default-outline-level="2" style:list-style-name="" style:class="chapter">
      <style:paragraph-properties fo:margin-top="0.353cm" fo:margin-bottom="0cm" style:contextual-spacing="false" fo:keep-together="always" fo:keep-with-next="always"/>
      <style:text-properties fo:color="#4f81bd" ns4: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ns4:char-complex-color ns4:theme-type="accent1" ns4:color-type="theme"/>
      </style:text-properties>
    </style:style>
    <style:style style:name="Heading_20_3" style:display-name="Heading 3" style:family="paragraph" style:parent-style-name="Standard" style:next-style-name="Standard" ns4:linked-style-name="Heading_20_3_20_Char" style:default-outline-level="3" style:list-style-name="" style:class="chapter">
      <style:paragraph-properties fo:margin-top="0.353cm" fo:margin-bottom="0cm" style:contextual-spacing="false" fo:keep-together="always" fo:keep-with-next="always"/>
      <style:text-properties fo:color="#4f81bd" ns4: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ns4:char-complex-color ns4:theme-type="accent1" ns4:color-type="theme"/>
      </style:text-properties>
    </style:style>
    <style:style style:name="Heading_20_4" style:display-name="Heading 4" style:family="paragraph" style:parent-style-name="Standard" style:next-style-name="Standard" ns4:linked-style-name="Heading_20_4_20_Char" style:default-outline-level="4" style:list-style-name="" style:class="chapter">
      <style:paragraph-properties fo:margin-top="0.353cm" fo:margin-bottom="0cm" style:contextual-spacing="false" fo:keep-together="always" fo:keep-with-next="always"/>
      <style:text-properties fo:color="#4f81bd" ns4: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ns4:char-complex-color ns4:theme-type="accent1" ns4:color-type="theme"/>
      </style:text-properties>
    </style:style>
    <style:style style:name="Heading_20_5" style:display-name="Heading 5" style:family="paragraph" style:parent-style-name="Standard" style:next-style-name="Standard" ns4:linked-style-name="Heading_20_5_20_Char" style:default-outline-level="5" style:list-style-name="" style:class="chapter">
      <style:paragraph-properties fo:margin-top="0.353cm" fo:margin-bottom="0cm" style:contextual-spacing="false" fo:keep-together="always" fo:keep-with-next="always"/>
      <style:text-properties fo:color="#243f60" ns4: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ns4:char-complex-color ns4:theme-type="accent1" ns4:color-type="theme">
          <ns4:transformation ns4:type="shade" ns4:value="5019"/>
        </ns4:char-complex-color>
      </style:text-properties>
    </style:style>
    <style:style style:name="Heading_20_6" style:display-name="Heading 6" style:family="paragraph" style:parent-style-name="Standard" style:next-style-name="Standard" ns4:linked-style-name="Heading_20_6_20_Char" style:default-outline-level="6" style:list-style-name="" style:class="chapter">
      <style:paragraph-properties fo:margin-top="0.353cm" fo:margin-bottom="0cm" style:contextual-spacing="false" fo:keep-together="always" fo:keep-with-next="always"/>
      <style:text-properties fo:color="#243f60" ns4: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ns4:char-complex-color ns4:theme-type="accent1" ns4:color-type="theme">
          <ns4:transformation ns4:type="shade" ns4:value="5019"/>
        </ns4:char-complex-color>
      </style:text-properties>
    </style:style>
    <style:style style:name="Heading_20_7" style:display-name="Heading 7" style:family="paragraph" style:parent-style-name="Standard" style:next-style-name="Standard" ns4:linked-style-name="Heading_20_7_20_Char" style:default-outline-level="7" style:list-style-name="" style:class="chapter">
      <style:paragraph-properties fo:margin-top="0.353cm" fo:margin-bottom="0cm" style:contextual-spacing="false" fo:keep-together="always" fo:keep-with-next="always"/>
      <style:text-properties fo:color="#404040" ns4: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ns4:char-complex-color ns4:theme-type="dark1" ns4:color-type="theme">
          <ns4:transformation ns4:type="tint" ns4:value="2509"/>
        </ns4:char-complex-color>
      </style:text-properties>
    </style:style>
    <style:style style:name="Heading_20_8" style:display-name="Heading 8" style:family="paragraph" style:parent-style-name="Standard" style:next-style-name="Standard" ns4:linked-style-name="Heading_20_8_20_Char" style:default-outline-level="8" style:list-style-name="" style:class="chapter">
      <style:paragraph-properties fo:margin-top="0.353cm" fo:margin-bottom="0cm" style:contextual-spacing="false" fo:keep-together="always" fo:keep-with-next="always"/>
      <style:text-properties fo:color="#4f81bd" ns4: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ns4:char-complex-color ns4:theme-type="accent1" ns4:color-type="theme"/>
      </style:text-properties>
    </style:style>
    <style:style style:name="Heading_20_9" style:display-name="Heading 9" style:family="paragraph" style:parent-style-name="Standard" style:next-style-name="Standard" ns4:linked-style-name="Heading_20_9_20_Char" style:default-outline-level="9" style:list-style-name="" style:class="chapter">
      <style:paragraph-properties fo:margin-top="0.353cm" fo:margin-bottom="0cm" style:contextual-spacing="false" fo:keep-together="always" fo:keep-with-next="always"/>
      <style:text-properties fo:color="#404040" ns4: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ns4:char-complex-color ns4:theme-type="dark1" ns4:color-type="theme">
          <ns4:transformation ns4:type="tint" ns4:value="2509"/>
        </ns4:char-complex-color>
      </style:text-properties>
    </style:style>
    <style:style style:name="No_20_Spacing" style:display-name="No Spacing" style:family="paragraph">
      <style:paragraph-properties fo:margin-top="0cm" fo:margin-bottom="0cm" style:contextual-spacing="false" fo:line-height="100%" fo:text-align="left" style:justify-single-word="false" fo:orphans="2" fo:widows="2" style:writing-mode="lr-tb"/>
    </style:style>
    <style:style style:name="Title" style:family="paragraph" style:parent-style-name="Standard" style:next-style-name="Standard" ns4: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ns4: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ns4:char-complex-color ns4:theme-type="dark2" ns4:color-type="theme">
          <ns4:transformation ns4:type="shade" ns4:value="2509"/>
        </ns4:char-complex-color>
      </style:text-properties>
    </style:style>
    <style:style style:name="Subtitle" style:family="paragraph" style:parent-style-name="Standard" style:next-style-name="Standard" ns4:linked-style-name="Subtitle_20_Char" style:class="chapter">
      <style:text-properties fo:color="#4f81bd" ns4: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ns4:char-complex-color ns4:theme-type="accent1" ns4:color-type="theme"/>
      </style:text-properties>
    </style:style>
    <style:style style:name="List_20_Paragraph" style:display-name="List Paragraph" style:family="paragraph" style:parent-style-name="Standard">
      <style:paragraph-properties fo:margin-left="1.27cm" fo:margin-top="0cm" fo:margin-bottom="0.212cm" style:contextual-spacing="true"/>
    </style:style>
    <style:style style:name="Body_20_Text_20_2" style:display-name="Body Text 2" style:family="paragraph" style:parent-style-name="Standard" ns4:linked-style-name="Body_20_Text_20_2_20_Char">
      <style:paragraph-properties fo:margin-top="0cm" fo:margin-bottom="0.212cm" style:contextual-spacing="false" fo:line-height="200%"/>
    </style:style>
    <style:style style:name="Body_20_Text_20_3" style:display-name="Body Text 3" style:family="paragraph" style:parent-style-name="Standard" ns4: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212cm" style:contextual-spacing="true" fo:text-indent="-0.635cm" style:auto-text-indent="false"/>
    </style:style>
    <style:style style:name="List_20_3_20__28_WW_29_" style:display-name="List 3 (WW)" style:family="paragraph" style:parent-style-name="Standard">
      <style:paragraph-properties fo:margin-left="1.905cm" fo:margin-top="0cm" fo:margin-bottom="0.212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212cm" style:contextual-spacing="true"/>
    </style:style>
    <style:style style:name="List_20_2" style:display-name="List 2" style:family="paragraph" style:parent-style-name="Standard" style:list-style-name="WWNum2" style:class="list">
      <style:paragraph-properties fo:margin-top="0cm" fo:margin-bottom="0.212cm" style:contextual-spacing="true"/>
    </style:style>
    <style:style style:name="List_20_3" style:display-name="List 3" style:family="paragraph" style:parent-style-name="Standard" style:list-style-name="WWNum3" style:class="list">
      <style:paragraph-properties fo:margin-top="0cm" fo:margin-bottom="0.212cm" style:contextual-spacing="true"/>
    </style:style>
    <style:style style:name="Numbering_20_1" style:display-name="Numbering 1" style:family="paragraph" style:parent-style-name="Standard" style:list-style-name="WWNum5" style:class="list">
      <style:paragraph-properties fo:margin-top="0cm" fo:margin-bottom="0.212cm" style:contextual-spacing="true"/>
    </style:style>
    <style:style style:name="Numbering_20_2" style:display-name="Numbering 2" style:family="paragraph" style:parent-style-name="Standard" style:list-style-name="WWNum6" style:class="list">
      <style:paragraph-properties fo:margin-top="0cm" fo:margin-bottom="0.212cm" style:contextual-spacing="true"/>
    </style:style>
    <style:style style:name="Numbering_20_3" style:display-name="Numbering 3" style:family="paragraph" style:parent-style-name="Standard" style:list-style-name="WWNum7" style:class="list">
      <style:paragraph-properties fo:margin-top="0cm" fo:margin-bottom="0.212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ns4:linked-style-name="Macro_20_Text_20_Char">
      <style:paragraph-properties fo:margin-top="0cm" fo:margin-bottom="0.353cm" style:contextual-spacing="false" fo:line-height="115%" fo:text-align="lef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ns4:linked-style-name="Quote_20_Char">
      <style:text-properties fo:color="#000000" ns4:opacity="100%" fo:font-style="italic" style:font-style-asian="italic" style:font-style-complex="italic">
        <ns4:char-complex-color ns4:theme-type="dark1" ns4:color-type="theme"/>
      </style:text-properties>
    </style:style>
    <style:style style:name="Intense_20_Quote" style:display-name="Intense Quote" style:family="paragraph" style:parent-style-name="Standard" style:next-style-name="Standard" ns4: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ns4:opacity="100%" fo:font-style="italic" fo:font-weight="bold" style:font-style-asian="italic" style:font-weight-asian="bold" style:font-style-complex="italic" style:font-weight-complex="bold">
        <ns4:char-complex-color ns4:theme-type="accent1" ns4: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ns4:linked-style-name="Header"/>
    <style:style style:name="Footer_20_Char" style:display-name="Footer Char" style:family="text" style:parent-style-name="Default_20_Paragraph_20_Font" ns4:linked-style-name="Footer"/>
    <style:style style:name="Default_20_Paragraph_20_Font" style:display-name="Default Paragraph Font" style:family="text"/>
    <style:style style:name="Heading_20_1_20_Char" style:display-name="Heading 1 Char" style:family="text" style:parent-style-name="Default_20_Paragraph_20_Font" ns4:linked-style-name="Heading_20_1">
      <style:text-properties fo:color="#365f91" ns4: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ns4:char-complex-color ns4:theme-type="accent1" ns4:color-type="theme">
          <ns4:transformation ns4:type="shade" ns4:value="2509"/>
        </ns4:char-complex-color>
      </style:text-properties>
    </style:style>
    <style:style style:name="Heading_20_2_20_Char" style:display-name="Heading 2 Char" style:family="text" style:parent-style-name="Default_20_Paragraph_20_Font" ns4:linked-style-name="Heading_20_2">
      <style:text-properties fo:color="#4f81bd" ns4: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ns4:char-complex-color ns4:theme-type="accent1" ns4:color-type="theme"/>
      </style:text-properties>
    </style:style>
    <style:style style:name="Heading_20_3_20_Char" style:display-name="Heading 3 Char" style:family="text" style:parent-style-name="Default_20_Paragraph_20_Font" ns4:linked-style-name="Heading_20_3">
      <style:text-properties fo:color="#4f81bd" ns4: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ns4:char-complex-color ns4:theme-type="accent1" ns4:color-type="theme"/>
      </style:text-properties>
    </style:style>
    <style:style style:name="Title_20_Char" style:display-name="Title Char" style:family="text" style:parent-style-name="Default_20_Paragraph_20_Font" ns4:linked-style-name="Title">
      <style:text-properties fo:color="#17365d" ns4: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ns4:char-complex-color ns4:theme-type="dark2" ns4:color-type="theme">
          <ns4:transformation ns4:type="shade" ns4:value="2509"/>
        </ns4:char-complex-color>
      </style:text-properties>
    </style:style>
    <style:style style:name="Subtitle_20_Char" style:display-name="Subtitle Char" style:family="text" style:parent-style-name="Default_20_Paragraph_20_Font" ns4:linked-style-name="Subtitle">
      <style:text-properties fo:color="#4f81bd" ns4: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ns4:char-complex-color ns4:theme-type="accent1" ns4: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ns4:linked-style-name="Body_20_Text_20_2"/>
    <style:style style:name="Body_20_Text_20_3_20_Char" style:display-name="Body Text 3 Char" style:family="text" style:parent-style-name="Default_20_Paragraph_20_Font" ns4:linked-style-name="Body_20_Text_20_3">
      <style:text-properties fo:font-size="8pt" style:font-size-asian="8pt" style:font-size-complex="8pt"/>
    </style:style>
    <style:style style:name="Macro_20_Text_20_Char" style:display-name="Macro Text Char" style:family="text" style:parent-style-name="Default_20_Paragraph_20_Font" ns4: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ns4:linked-style-name="Quote">
      <style:text-properties fo:color="#000000" ns4:opacity="100%" fo:font-style="italic" style:font-style-asian="italic" style:font-style-complex="italic">
        <ns4:char-complex-color ns4:theme-type="dark1" ns4:color-type="theme"/>
      </style:text-properties>
    </style:style>
    <style:style style:name="Heading_20_4_20_Char" style:display-name="Heading 4 Char" style:family="text" style:parent-style-name="Default_20_Paragraph_20_Font" ns4:linked-style-name="Heading_20_4">
      <style:text-properties fo:color="#4f81bd" ns4: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ns4:char-complex-color ns4:theme-type="accent1" ns4:color-type="theme"/>
      </style:text-properties>
    </style:style>
    <style:style style:name="Heading_20_5_20_Char" style:display-name="Heading 5 Char" style:family="text" style:parent-style-name="Default_20_Paragraph_20_Font" ns4:linked-style-name="Heading_20_5">
      <style:text-properties fo:color="#243f60" ns4: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ns4:char-complex-color ns4:theme-type="accent1" ns4:color-type="theme">
          <ns4:transformation ns4:type="shade" ns4:value="5019"/>
        </ns4:char-complex-color>
      </style:text-properties>
    </style:style>
    <style:style style:name="Heading_20_6_20_Char" style:display-name="Heading 6 Char" style:family="text" style:parent-style-name="Default_20_Paragraph_20_Font" ns4:linked-style-name="Heading_20_6">
      <style:text-properties fo:color="#243f60" ns4: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ns4:char-complex-color ns4:theme-type="accent1" ns4:color-type="theme">
          <ns4:transformation ns4:type="shade" ns4:value="5019"/>
        </ns4:char-complex-color>
      </style:text-properties>
    </style:style>
    <style:style style:name="Heading_20_7_20_Char" style:display-name="Heading 7 Char" style:family="text" style:parent-style-name="Default_20_Paragraph_20_Font" ns4:linked-style-name="Heading_20_7">
      <style:text-properties fo:color="#404040" ns4: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ns4:char-complex-color ns4:theme-type="dark1" ns4:color-type="theme">
          <ns4:transformation ns4:type="tint" ns4:value="2509"/>
        </ns4:char-complex-color>
      </style:text-properties>
    </style:style>
    <style:style style:name="Heading_20_8_20_Char" style:display-name="Heading 8 Char" style:family="text" style:parent-style-name="Default_20_Paragraph_20_Font" ns4:linked-style-name="Heading_20_8">
      <style:text-properties fo:color="#4f81bd" ns4: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ns4:char-complex-color ns4:theme-type="accent1" ns4:color-type="theme"/>
      </style:text-properties>
    </style:style>
    <style:style style:name="Heading_20_9_20_Char" style:display-name="Heading 9 Char" style:family="text" style:parent-style-name="Default_20_Paragraph_20_Font" ns4:linked-style-name="Heading_20_9">
      <style:text-properties fo:color="#404040" ns4: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ns4:char-complex-color ns4:theme-type="dark1" ns4:color-type="theme">
          <ns4:transformation ns4:type="tint" ns4:value="2509"/>
        </ns4: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ns4:linked-style-name="Intense_20_Quote">
      <style:text-properties fo:color="#4f81bd" ns4:opacity="100%" fo:font-style="italic" fo:font-weight="bold" style:font-style-asian="italic" style:font-weight-asian="bold" style:font-style-complex="italic" style:font-weight-complex="bold">
        <ns4:char-complex-color ns4:theme-type="accent1" ns4:color-type="theme"/>
      </style:text-properties>
    </style:style>
    <style:style style:name="Subtle_20_Emphasis" style:display-name="Subtle Emphasis" style:family="text" style:parent-style-name="Default_20_Paragraph_20_Font">
      <style:text-properties fo:color="#808080" ns4:opacity="100%" fo:font-style="italic" style:font-style-asian="italic" style:font-style-complex="italic">
        <ns4:char-complex-color ns4:theme-type="dark1" ns4:color-type="theme">
          <ns4:transformation ns4:type="tint" ns4:value="5019"/>
        </ns4:char-complex-color>
      </style:text-properties>
    </style:style>
    <style:style style:name="Intense_20_Emphasis" style:display-name="Intense Emphasis" style:family="text" style:parent-style-name="Default_20_Paragraph_20_Font">
      <style:text-properties fo:color="#4f81bd" ns4:opacity="100%" fo:font-style="italic" fo:font-weight="bold" style:font-style-asian="italic" style:font-weight-asian="bold" style:font-style-complex="italic" style:font-weight-complex="bold">
        <ns4:char-complex-color ns4:theme-type="accent1" ns4:color-type="theme"/>
      </style:text-properties>
    </style:style>
    <style:style style:name="Subtle_20_Reference" style:display-name="Subtle Reference" style:family="text" style:parent-style-name="Default_20_Paragraph_20_Font">
      <style:text-properties fo:font-variant="small-caps" fo:color="#c0504d" ns4:opacity="100%" style:text-underline-style="solid" style:text-underline-width="auto" style:text-underline-color="font-color">
        <ns4:char-complex-color ns4:theme-type="accent2" ns4:color-type="theme"/>
      </style:text-properties>
    </style:style>
    <style:style style:name="Intense_20_Reference" style:display-name="Intense Reference" style:family="text" style:parent-style-name="Default_20_Paragraph_20_Font">
      <style:text-properties fo:font-variant="small-caps" fo:color="#c0504d" ns4:opacity="100%" fo:letter-spacing="0.009cm" style:text-underline-style="solid" style:text-underline-width="auto" style:text-underline-color="font-color" fo:font-weight="bold" style:font-weight-asian="bold" style:font-weight-complex="bold">
        <ns4:char-complex-color ns4:theme-type="accent2" ns4: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ns2:x="0cm" ns2: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ns4: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ns4: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ns4: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ns4: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ns4: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ns4: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ns4: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ns4: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ns4: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ns4: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ns4: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ns4: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ns4: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ns4: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ns4: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ns4: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ns4: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ns4: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ns4: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ns4: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ns4: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ns4: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ns4: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ns4: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ns4: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ns4: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ns4: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ns4: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ns4: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ns4: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ns4: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ns4: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ns4: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ns4: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ns4: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ns4: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ns4: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ns4: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ns4: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ns4: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ns4: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ns4: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ns4: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ns4: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ns4: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ns4: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ns4: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ns4: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ns4: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ns4: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ns4: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ns4: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ns4: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ns4: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ns4: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ns4: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ns4: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ns4: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ns4: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ns4: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ns4: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ns4: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ns4: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ns4: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ns4: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ns4: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ns4: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ns4: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ns4: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ns4: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ns4: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ns4: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ns4: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ns4: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ns4: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ns4: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ns4: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ns4: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ns4: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ns4: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ns4: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ns4: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ns4: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ns4: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ns4: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ns4: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ns4: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ns4: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ns4: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ns4: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ns4: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ns4: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ns4: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ns4: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ns4: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ns4: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ns4: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ns4: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ns4: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ns4: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ns4:theme ns4:name="Office Theme">
      <ns4:theme-colors ns4:name="Office">
        <ns4:color ns4:name="dark1" ns4:color="#000000"/>
        <ns4:color ns4:name="light1" ns4:color="#ffffff"/>
        <ns4:color ns4:name="dark2" ns4:color="#1f497d"/>
        <ns4:color ns4:name="light2" ns4:color="#eeece1"/>
        <ns4:color ns4:name="accent1" ns4:color="#4f81bd"/>
        <ns4:color ns4:name="accent2" ns4:color="#c0504d"/>
        <ns4:color ns4:name="accent3" ns4:color="#9bbb59"/>
        <ns4:color ns4:name="accent4" ns4:color="#8064a2"/>
        <ns4:color ns4:name="accent5" ns4:color="#4bacc6"/>
        <ns4:color ns4:name="accent6" ns4:color="#f79646"/>
        <ns4:color ns4:name="hyperlink" ns4:color="#0000ff"/>
        <ns4:color ns4:name="followed-hyperlink" ns4:color="#800080"/>
      </ns4:theme-colors>
    </ns4: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ns4: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ns4: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29cm" style:dynamic-spacing="true"/>
      </style:footer-style>
    </style:page-layout>
    <style:page-layout style:name="Mpm3">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ns4: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iv</text:page-number></text:p>
      </style:footer>
    </style:master-page>
    <style:master-page style:name="Converted2" style:page-layout-name="Mpm3" draw:style-name="Mdp1">
      <style:footer>
        <text:p text:style-name="MP1"><text:page-number text:select-page="current">26</text:page-number></text:p>
      </style:footer>
    </style:master-page>
    <style:master-page style:name="Converted3" style:page-layout-name="Mpm2" draw:style-name="Mdp1">
      <style:footer>
        <text:p text:style-name="MP1"><text:page-number text:select-page="current">iii</text:page-number></text:p>
      </style:footer>
    </style:master-page>
    <style:master-page style:name="Converted4" style:page-layout-name="Mpm2" draw:style-name="Mdp1">
      <style:footer>
        <text:p text:style-name="MP1"><text:page-number text:select-page="current">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2</meta:editing-cycles>
    <meta:creation-date>2013-12-23T23:15:00</meta:creation-date>
    <dc:date>2026-05-20T15:01:04.636700708</dc:date>
    <meta:editing-duration>PT3M57S</meta:editing-duration>
    <meta:generator>LibreOffice/26.2.2.2$Linux_X86_64 LibreOffice_project/620$Build-2</meta:generator>
    <meta:document-statistic meta:table-count="0" meta:image-count="4" meta:object-count="0" meta:page-count="38" meta:paragraph-count="171" meta:word-count="5851" meta:character-count="40159" meta:non-whitespace-character-count="34321"/>
    <meta:user-defined meta:name="AppVersion">14.0000</meta:user-defined>
    <meta:template xlink:type="simple" xlink:actuate="onRequest" xlink:title="Normal.dotm" xlink:href=""/>
  </office:meta>
</office:document-meta>
</file>